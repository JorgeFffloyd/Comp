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079E1B30A49.png" manifest:media-type="image/png"/>
  <manifest:file-entry manifest:full-path="Pictures/100000010000020D000000BED79BF484.png" manifest:media-type="image/png"/>
  <manifest:file-entry manifest:full-path="Pictures/10000001000001C8000000C9FFA03BC5.png" manifest:media-type="image/png"/>
  <manifest:file-entry manifest:full-path="Pictures/100000010000021C0000007ACC4E3FED.png" manifest:media-type="image/png"/>
  <manifest:file-entry manifest:full-path="Pictures/10000001000002460000010704D8B31E.png" manifest:media-type="image/png"/>
  <manifest:file-entry manifest:full-path="Pictures/10000001000002F90000011CF8A943D8.png" manifest:media-type="image/png"/>
  <manifest:file-entry manifest:full-path="Pictures/10000001000002F0000000DCE7BF4976.png" manifest:media-type="image/png"/>
  <manifest:file-entry manifest:full-path="Pictures/100000010000015D000000C5475BCE51.png" manifest:media-type="image/png"/>
  <manifest:file-entry manifest:full-path="Pictures/10000001000002F5000000B9711C207A.png" manifest:media-type="image/png"/>
  <manifest:file-entry manifest:full-path="Pictures/10000001000002F500000153A4E1D6DB.png" manifest:media-type="image/png"/>
  <manifest:file-entry manifest:full-path="Pictures/100000010000019D00000057E204D668.png" manifest:media-type="image/png"/>
  <manifest:file-entry manifest:full-path="Pictures/10000001000001C9000000642970CC45.png" manifest:media-type="image/png"/>
  <manifest:file-entry manifest:full-path="Pictures/10000001000002360000005353E4206D.png" manifest:media-type="image/png"/>
  <manifest:file-entry manifest:full-path="Pictures/10000001000002040000004F69C3D5C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solid" draw:fill-color="#ebeef2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ebeef2"/>
    </style:style>
    <style:style style:name="T1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3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5" style:family="text">
      <style:text-properties fo:color="#000000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6" style:family="text">
      <style:text-properties fo:color="#000000" loext:opacity="100%" style:font-name="Times New Roman" fo:font-size="14.1000003814697pt" fo:font-weight="normal" style:font-name-asian="Times New Roman" style:font-size-asian="14.1000003814697pt" style:font-weight-asian="normal" style:font-name-complex="Times New Roman" style:font-size-complex="14.1000003814697pt" style:font-weight-complex="normal"/>
    </style:style>
    <style:style style:name="T7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8" style:family="text">
      <style:text-properties fo:color="#0f1115" loext:opacity="100%" style:font-name="Segoe UI" fo:font-size="9.89999961853027pt" fo:font-style="italic" fo:font-weight="normal" style:font-name-asian="Segoe UI" style:font-size-asian="9.89999961853027pt" style:font-style-asian="italic" style:font-weight-asian="normal" style:font-name-complex="Segoe UI" style:font-size-complex="9.89999961853027pt" style:font-style-complex="italic" style:font-weight-complex="normal"/>
    </style:style>
    <style:style style:name="T9" style:family="text">
      <style:text-properties fo:color="#0f1115" loext:opacity="100%" style:font-name="Times New Roman" fo:font-size="14.1000003814697pt" fo:font-weight="normal" style:font-name-asian="Times New Roman" style:font-size-asian="14.1000003814697pt" style:font-weight-asian="normal" style:font-name-complex="Times New Roman" style:font-size-complex="14.1000003814697pt" style:font-weight-complex="normal"/>
    </style:style>
    <style:style style:name="T10" style:family="text">
      <style:text-properties fo:color="#0f1115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11" style:family="text">
      <style:text-properties fo:color="#0f1115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color="#0f1115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651cm" svg:height="0.471cm" svg:x="2.795cm" svg:y="1.841cm">
          <draw:text-box>
            <text:p text:style-name="P1"><text:span text:style-name="T1">МИНИСТЕРСТВО НАУКИ И ВЫСШЕГО ОБРАЗОВАНИЯ РОССИЙСКОЙ ФЕДЕРАЦИИ</text:span></text:p>
          </draw:text-box>
        </draw:frame>
        <draw:frame draw:style-name="gr2" draw:text-style-name="P3" draw:layer="layout" svg:width="0.388cm" svg:height="0.433cm" svg:x="19.447cm" svg:y="1.8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3.096cm" svg:height="0.471cm" svg:x="4.628cm" svg:y="2.328cm">
          <draw:text-box>
            <text:p text:style-name="P1"><text:span text:style-name="T1">Федеральное государственное бюджетное образовательное учреждение </text:span></text:p>
          </draw:text-box>
        </draw:frame>
        <draw:frame draw:style-name="gr1" draw:text-style-name="P2" draw:layer="layout" svg:width="4.026cm" svg:height="0.471cm" svg:x="9.163cm" svg:y="2.815cm">
          <draw:text-box>
            <text:p text:style-name="P1"><text:span text:style-name="T1">высшего образования </text:span></text:p>
          </draw:text-box>
        </draw:frame>
        <draw:frame draw:style-name="gr2" draw:text-style-name="P3" draw:layer="layout" svg:width="10.532cm" svg:height="0.433cm" svg:x="5.923cm" svg:y="3.307cm">
          <draw:text-box>
            <text:p text:style-name="P1"><text:span text:style-name="T3">«КУБАНСКИЙ ГОСУДАРСТВЕННЫЙ УНИВЕРСИТЕТ» </text:span></text:p>
          </draw:text-box>
        </draw:frame>
        <draw:frame draw:style-name="gr2" draw:text-style-name="P3" draw:layer="layout" svg:width="4.14cm" svg:height="0.433cm" svg:x="9.108cm" svg:y="3.756cm">
          <draw:text-box>
            <text:p text:style-name="P1"><text:span text:style-name="T3">(ФГБОУ ВО «КубГУ») </text:span></text:p>
          </draw:text-box>
        </draw:frame>
        <draw:frame draw:style-name="gr3" draw:text-style-name="P4" draw:layer="layout" svg:width="14.961cm" svg:height="0.547cm" svg:x="3.663cm" svg:y="4.407cm">
          <draw:text-box>
            <text:p text:style-name="P1"><text:span text:style-name="T4">Факультет компьютерных технологий и прикладной математики </text:span></text:p>
          </draw:text-box>
        </draw:frame>
        <draw:frame draw:style-name="gr4" draw:text-style-name="P5" draw:layer="layout" svg:width="0.317cm" svg:height="0.353cm" svg:x="18.584cm" svg:y="4.5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927cm" svg:height="0.547cm" svg:x="6.669cm" svg:y="5.185cm">
          <draw:text-box>
            <text:p text:style-name="P1"><text:span text:style-name="T4">Кафедра информационных технологий </text:span></text:p>
          </draw:text-box>
        </draw:frame>
        <draw:frame draw:style-name="gr4" draw:text-style-name="P5" draw:layer="layout" svg:width="0.317cm" svg:height="0.353cm" svg:x="15.574cm" svg:y="5.34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11.06cm" svg:y="5.75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11.183cm" svg:y="5.91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6.3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6.4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6.81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6.9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7.2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7.3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7.78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7.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8.27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8.36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8.7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8.85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9.2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9.34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308cm" svg:height="0.547cm" svg:x="6.042cm" svg:y="9.742cm">
          <draw:text-box>
            <text:p text:style-name="P1"><text:span text:style-name="T4">ОТЧЕТ ПО ЛАБОРАТОРНОЙ РАБОТЕ № 4 </text:span></text:p>
          </draw:text-box>
        </draw:frame>
        <draw:frame draw:style-name="gr3" draw:text-style-name="P4" draw:layer="layout" svg:width="3.463cm" svg:height="0.547cm" svg:x="9.459cm" svg:y="10.309cm">
          <draw:text-box>
            <text:p text:style-name="P1"><text:span text:style-name="T4">по дисциплине </text:span></text:p>
          </draw:text-box>
        </draw:frame>
        <draw:frame draw:style-name="gr3" draw:text-style-name="P4" draw:layer="layout" svg:width="6.067cm" svg:height="0.547cm" svg:x="8.096cm" svg:y="10.876cm">
          <draw:text-box>
            <text:p text:style-name="P1"><text:span text:style-name="T4"><text:s/>«Операционные системы»</text:span></text:p>
          </draw:text-box>
        </draw:frame>
        <draw:frame draw:style-name="gr4" draw:text-style-name="P5" draw:layer="layout" svg:width="0.317cm" svg:height="0.353cm" svg:x="14.146cm" svg:y="11.03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11.123cm" svg:y="11.43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11.123cm" svg:y="1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11.06cm" svg:y="12.3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11.183cm" svg:y="12.5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68cm" svg:y="12.93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11.174cm" svg:y="13.0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68cm" svg:y="13.4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11.174cm" svg:y="13.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68cm" svg:y="13.912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6.136cm" svg:height="0.568cm" svg:x="9.42cm" svg:y="14.39cm" svg:viewBox="0 0 6137 569" draw:points="0,0 6137,0 6137,569 0,569">
          <text:p/>
        </draw:polygon>
        <draw:frame draw:style-name="gr4" draw:text-style-name="P5" draw:layer="layout" svg:width="0.317cm" svg:height="0.353cm" svg:x="11.174cm" svg:y="14.00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19cm" svg:height="0.547cm" svg:x="2.249cm" svg:y="14.398cm">
          <draw:text-box>
            <text:p text:style-name="P1"><text:span text:style-name="T6">Выполнил студент группы ПМ23 </text:span></text:p>
          </draw:text-box>
        </draw:frame>
        <draw:frame draw:style-name="gr1" draw:text-style-name="P2" draw:layer="layout" svg:width="6.14cm" svg:height="0.471cm" svg:x="9.421cm" svg:y="14.462cm">
          <draw:text-box>
            <text:p text:style-name="P1"><text:span text:style-name="T1"><text:s text:c="58"/></text:span></text:p>
          </draw:text-box>
        </draw:frame>
        <draw:frame draw:style-name="gr3" draw:text-style-name="P4" draw:layer="layout" svg:width="2.645cm" svg:height="0.547cm" svg:x="15.557cm" svg:y="14.398cm">
          <draw:text-box>
            <text:p text:style-name="P1"><text:span text:style-name="T6">Е. Е. Шопин</text:span></text:p>
          </draw:text-box>
        </draw:frame>
        <draw:polygon draw:style-name="gr6" draw:text-style-name="P7" draw:layer="layout" svg:width="5.818cm" svg:height="0.021cm" svg:x="9.42cm" svg:y="14.886cm" svg:viewBox="0 0 5819 22" draw:points="0,0 5819,0 5819,22 0,22">
          <text:p/>
        </draw:polygon>
        <draw:frame draw:style-name="gr4" draw:text-style-name="P5" draw:layer="layout" svg:width="0.317cm" svg:height="0.353cm" svg:x="18.622cm" svg:y="14.55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2.249cm" svg:y="14.9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2.372cm" svg:y="15.12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857cm" svg:height="0.547cm" svg:x="2.249cm" svg:y="15.534cm">
          <draw:text-box>
            <text:p text:style-name="P1"><text:span text:style-name="T6">Направление подготовки 01.03.02 Прикладная математика и информатика </text:span></text:p>
          </draw:text-box>
        </draw:frame>
        <draw:polygon draw:style-name="gr6" draw:text-style-name="P7" draw:layer="layout" svg:width="10.28cm" svg:height="0.026cm" svg:x="7.664cm" svg:y="16.029cm" svg:viewBox="0 0 10281 27" draw:points="0,0 10281,0 10281,27 0,27">
          <text:p/>
        </draw:polygon>
        <draw:frame draw:style-name="gr4" draw:text-style-name="P5" draw:layer="layout" svg:width="0.317cm" svg:height="0.353cm" svg:x="18.063cm" svg:y="15.69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236cm" svg:height="0.547cm" svg:x="2.249cm" svg:y="16.101cm">
          <draw:text-box>
            <text:p text:style-name="P1"><text:span text:style-name="T6">Курс <text:s text:c="3"/>2   <text:s/></text:span></text:p>
          </draw:text-box>
        </draw:frame>
        <draw:polygon draw:style-name="gr6" draw:text-style-name="P7" draw:layer="layout" svg:width="0.369cm" svg:height="0.025cm" svg:x="3.412cm" svg:y="16.597cm" svg:viewBox="0 0 370 26" draw:points="0,0 370,0 370,26 0,26">
          <text:p/>
        </draw:polygon>
        <draw:polygon draw:style-name="gr6" draw:text-style-name="P7" draw:layer="layout" svg:width="0.249cm" svg:height="0.025cm" svg:x="3.781cm" svg:y="16.597cm" svg:viewBox="0 0 250 26" draw:points="0,0 250,0 250,26 0,26">
          <text:p/>
        </draw:polygon>
        <draw:polygon draw:style-name="gr6" draw:text-style-name="P7" draw:layer="layout" svg:width="0.318cm" svg:height="0.025cm" svg:x="4.03cm" svg:y="16.597cm" svg:viewBox="0 0 319 26" draw:points="0,0 319,0 319,26 0,26">
          <text:p/>
        </draw:polygon>
        <draw:frame draw:style-name="gr4" draw:text-style-name="P5" draw:layer="layout" svg:width="0.317cm" svg:height="0.353cm" svg:x="4.475cm" svg:y="16.2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2.249cm" svg:y="16.66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2.372cm" svg:y="16.82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4cm" svg:height="0.547cm" svg:x="2.249cm" svg:y="17.23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17cm" svg:height="0.353cm" svg:x="2.372cm" svg:y="17.394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5.822cm" svg:height="0.567cm" svg:x="9.276cm" svg:y="18.366cm" svg:viewBox="0 0 5823 568" draw:points="0,0 5823,0 5823,568 0,568">
          <text:p/>
        </draw:polygon>
        <draw:frame draw:style-name="gr3" draw:text-style-name="P4" draw:layer="layout" svg:width="1.86cm" svg:height="0.547cm" svg:x="2.249cm" svg:y="17.803cm">
          <draw:text-box>
            <text:p text:style-name="P1"><text:span text:style-name="T6">Принял, </text:span></text:p>
          </draw:text-box>
        </draw:frame>
        <draw:frame draw:style-name="gr3" draw:text-style-name="P4" draw:layer="layout" svg:width="7.048cm" svg:height="0.547cm" svg:x="2.249cm" svg:y="18.374cm">
          <draw:text-box>
            <text:p text:style-name="P1"><text:span text:style-name="T6">канд. техн. наук, доцент каф. ИТ </text:span></text:p>
          </draw:text-box>
        </draw:frame>
        <draw:frame draw:style-name="gr1" draw:text-style-name="P2" draw:layer="layout" svg:width="5.823cm" svg:height="0.471cm" svg:x="9.277cm" svg:y="18.438cm">
          <draw:text-box>
            <text:p text:style-name="P1"><text:span text:style-name="T1"><text:s text:c="55"/></text:span></text:p>
          </draw:text-box>
        </draw:frame>
        <draw:frame draw:style-name="gr3" draw:text-style-name="P4" draw:layer="layout" svg:width="3.544cm" svg:height="0.547cm" svg:x="15.099cm" svg:y="18.374cm">
          <draw:text-box>
            <text:p text:style-name="P1"><text:span text:style-name="T6">А.А. Полупанов </text:span></text:p>
          </draw:text-box>
        </draw:frame>
        <draw:polygon draw:style-name="gr6" draw:text-style-name="P7" draw:layer="layout" svg:width="5.505cm" svg:height="0.022cm" svg:x="9.276cm" svg:y="18.861cm" svg:viewBox="0 0 5506 23" draw:points="0,0 5506,0 5506,23 0,23">
          <text:p/>
        </draw:polygon>
        <draw:frame draw:style-name="gr4" draw:text-style-name="P5" draw:layer="layout" svg:width="0.317cm" svg:height="0.353cm" svg:x="18.63cm" svg:y="18.5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18.9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19.0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19.42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19.5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19.91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0.0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0.40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0.4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0.8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0.98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1.37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1.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1.86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1.95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2.35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2.44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2.83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2.93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3.325cm">
          <draw:text-box>
            <text:p text:style-name="P1"><text:span text:style-name="T1"><text:s text:c="2"/></text:span></text:p>
          </draw:text-box>
        </draw:frame>
        <draw:frame draw:style-name="gr4" draw:text-style-name="P5" draw:layer="layout" svg:width="0.317cm" svg:height="0.353cm" svg:x="2.249cm" svg:y="23.8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49cm" svg:y="24.1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17cm" svg:height="0.353cm" svg:x="2.355cm" svg:y="24.2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5cm" svg:height="0.547cm" svg:x="9.878cm" svg:y="24.662cm">
          <draw:text-box>
            <text:p text:style-name="P1"><text:span text:style-name="T6">Краснодар <text:s/></text:span></text:p>
          </draw:text-box>
        </draw:frame>
        <draw:frame draw:style-name="gr4" draw:text-style-name="P5" draw:layer="layout" svg:width="0.317cm" svg:height="0.353cm" svg:x="12.368cm" svg:y="24.8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16cm" svg:height="0.547cm" svg:x="10.627cm" svg:y="25.229cm">
          <draw:text-box>
            <text:p text:style-name="P1"><text:span text:style-name="T6">2026 </text:span></text:p>
          </draw:text-box>
        </draw:frame>
        <draw:frame draw:style-name="gr2" draw:text-style-name="P3" draw:layer="layout" svg:width="0.388cm" svg:height="0.433cm" svg:x="2.249cm" svg:y="25.7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249cm" svg:y="26.56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3.248cm" svg:y="27.456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6">
        <draw:frame draw:style-name="gr3" draw:text-style-name="P4" draw:layer="layout" svg:width="2.419cm" svg:height="0.547cm" svg:x="3.248cm" svg:y="1.849cm">
          <draw:text-box>
            <text:p text:style-name="P1"><text:span text:style-name="T4">Задание 1. </text:span></text:p>
          </draw:text-box>
        </draw:frame>
        <draw:frame draw:style-name="gr3" draw:text-style-name="P4" draw:layer="layout" svg:width="0.494cm" svg:height="0.547cm" svg:x="1.249cm" svg:y="2.408cm">
          <draw:text-box>
            <text:p text:style-name="P1"><text:span text:style-name="T6">1.</text:span></text:p>
          </draw:text-box>
        </draw:frame>
        <draw:frame draw:style-name="gr3" draw:text-style-name="P4" draw:layer="layout" svg:width="0.494cm" svg:height="0.556cm" svg:x="1.621cm" svg:y="2.40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35cm" svg:height="0.471cm" svg:x="2.249cm" svg:y="2.4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073cm" svg:height="0.547cm" svg:x="2.346cm" svg:y="2.408cm">
          <draw:text-box>
            <text:p text:style-name="P1"><text:span text:style-name="T6">Создайте </text:span></text:p>
          </draw:text-box>
        </draw:frame>
        <draw:frame draw:style-name="gr3" draw:text-style-name="P4" draw:layer="layout" svg:width="3.177cm" svg:height="0.547cm" svg:x="4.58cm" svg:y="2.408cm">
          <draw:text-box>
            <text:p text:style-name="P1"><text:span text:style-name="T6">пользователей </text:span></text:p>
          </draw:text-box>
        </draw:frame>
        <draw:frame draw:style-name="gr3" draw:text-style-name="P4" draw:layer="layout" svg:width="1.199cm" svg:height="0.547cm" svg:x="7.913cm" svg:y="2.408cm">
          <draw:text-box>
            <text:p text:style-name="P1"><text:span text:style-name="T6">user1 </text:span></text:p>
          </draw:text-box>
        </draw:frame>
        <draw:frame draw:style-name="gr3" draw:text-style-name="P4" draw:layer="layout" svg:width="0.494cm" svg:height="0.547cm" svg:x="9.275cm" svg:y="2.408cm">
          <draw:text-box>
            <text:p text:style-name="P1"><text:span text:style-name="T6">и </text:span></text:p>
          </draw:text-box>
        </draw:frame>
        <draw:frame draw:style-name="gr3" draw:text-style-name="P4" draw:layer="layout" svg:width="1.199cm" svg:height="0.547cm" svg:x="9.828cm" svg:y="2.408cm">
          <draw:text-box>
            <text:p text:style-name="P1"><text:span text:style-name="T6">user2 </text:span></text:p>
          </draw:text-box>
        </draw:frame>
        <draw:frame draw:style-name="gr3" draw:text-style-name="P4" draw:layer="layout" svg:width="0.494cm" svg:height="0.547cm" svg:x="11.193cm" svg:y="2.408cm">
          <draw:text-box>
            <text:p text:style-name="P1"><text:span text:style-name="T6">с </text:span></text:p>
          </draw:text-box>
        </draw:frame>
        <draw:frame draw:style-name="gr3" draw:text-style-name="P4" draw:layer="layout" svg:width="2.649cm" svg:height="0.547cm" svg:x="11.705cm" svg:y="2.408cm">
          <draw:text-box>
            <text:p text:style-name="P1"><text:span text:style-name="T6">домашними </text:span></text:p>
          </draw:text-box>
        </draw:frame>
        <draw:frame draw:style-name="gr3" draw:text-style-name="P4" draw:layer="layout" svg:width="2.519cm" svg:height="0.547cm" svg:x="14.513cm" svg:y="2.408cm">
          <draw:text-box>
            <text:p text:style-name="P1"><text:span text:style-name="T6">каталогами </text:span></text:p>
          </draw:text-box>
        </draw:frame>
        <draw:frame draw:style-name="gr3" draw:text-style-name="P4" draw:layer="layout" svg:width="0.494cm" svg:height="0.547cm" svg:x="17.191cm" svg:y="2.408cm">
          <draw:text-box>
            <text:p text:style-name="P1"><text:span text:style-name="T6">и </text:span></text:p>
          </draw:text-box>
        </draw:frame>
        <draw:frame draw:style-name="gr3" draw:text-style-name="P4" draw:layer="layout" svg:width="2.37cm" svg:height="0.547cm" svg:x="17.748cm" svg:y="2.408cm">
          <draw:text-box>
            <text:p text:style-name="P1"><text:span text:style-name="T6">оболочкой </text:span></text:p>
          </draw:text-box>
        </draw:frame>
        <draw:frame draw:style-name="gr3" draw:text-style-name="P4" draw:layer="layout" svg:width="1.942cm" svg:height="0.547cm" svg:x="1.249cm" svg:y="3.264cm">
          <draw:text-box>
            <text:p text:style-name="P1"><text:span text:style-name="T6">/bin/bash </text:span></text:p>
          </draw:text-box>
        </draw:frame>
        <draw:frame draw:style-name="gr3" draw:text-style-name="P4" draw:layer="layout" svg:width="0.494cm" svg:height="0.547cm" svg:x="2.249cm" svg:y="4.11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19.083cm" svg:y="10.63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9.733cm" svg:height="0.547cm" svg:x="5.711cm" svg:y="11.363cm">
          <draw:text-box>
            <text:p text:style-name="P1"><text:span text:style-name="T6">Рисунок 1 – Вывод ls -l /home после создания </text:span></text:p>
          </draw:text-box>
        </draw:frame>
        <draw:frame draw:style-name="gr3" draw:text-style-name="P4" draw:layer="layout" svg:width="0.494cm" svg:height="0.547cm" svg:x="1.249cm" svg:y="12.214cm">
          <draw:text-box>
            <text:p text:style-name="P1"><text:span text:style-name="T6">2.</text:span></text:p>
          </draw:text-box>
        </draw:frame>
        <draw:frame draw:style-name="gr3" draw:text-style-name="P4" draw:layer="layout" svg:width="0.494cm" svg:height="0.556cm" svg:x="1.621cm" svg:y="12.207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35cm" svg:height="0.471cm" svg:x="2.249cm" svg:y="12.27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544cm" svg:height="0.547cm" svg:x="2.346cm" svg:y="12.214cm">
          <draw:text-box>
            <text:p text:style-name="P1"><text:span text:style-name="T6">Назначьте пароли для user1 и user2 </text:span></text:p>
          </draw:text-box>
        </draw:frame>
        <draw:polygon draw:style-name="gr5" draw:text-style-name="P6" draw:layer="layout" svg:width="4.936cm" svg:height="0.58cm" svg:x="9.967cm" svg:y="19.734cm" svg:viewBox="0 0 4937 581" draw:points="0,0 4937,0 4937,581 0,581">
          <text:p/>
        </draw:polygon>
        <draw:frame draw:style-name="gr3" draw:text-style-name="P4" draw:layer="layout" svg:width="0.494cm" svg:height="0.547cm" svg:x="15.794cm" svg:y="19.02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709cm" svg:height="0.547cm" svg:x="7.342cm" svg:y="19.754cm">
          <draw:text-box>
            <text:p text:style-name="P1"><text:span text:style-name="T6">Рисунок 2 – </text:span><text:span text:style-name="T9">Процесс смены пароля </text:span><text:span text:style-name="T6"><text:s/></text:span></text:p>
          </draw:text-box>
        </draw:frame>
        <draw:frame draw:style-name="gr3" draw:text-style-name="P4" draw:layer="layout" svg:width="0.494cm" svg:height="0.547cm" svg:x="1.249cm" svg:y="20.609cm">
          <draw:text-box>
            <text:p text:style-name="P1"><text:span text:style-name="T6">3.</text:span></text:p>
          </draw:text-box>
        </draw:frame>
        <draw:frame draw:style-name="gr3" draw:text-style-name="P4" draw:layer="layout" svg:width="0.494cm" svg:height="0.556cm" svg:x="1.621cm" svg:y="20.60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2.929cm" svg:height="0.547cm" svg:x="2.249cm" svg:y="20.609cm">
          <draw:text-box>
            <text:p text:style-name="P1"><text:span text:style-name="T6">Настройте сроки действия пароля для каждого пользователя </text:span></text:p>
          </draw:text-box>
        </draw:frame>
        <draw:frame draw:style-name="gr3" draw:text-style-name="P4" draw:layer="layout" svg:width="0.494cm" svg:height="0.547cm" svg:x="17.187cm" svg:y="26.72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547cm" svg:height="0.547cm" svg:x="4.429cm" svg:y="27.46cm">
          <draw:text-box>
            <text:p text:style-name="P1"><text:span text:style-name="T6">Рисунок 3 – <text:s/>Вывод chage -l user1 с нужными параметрами </text:span></text:p>
          </draw:text-box>
        </draw:frame>
        <draw:frame draw:style-name="gr8" draw:text-style-name="P9" draw:layer="layout" svg:width="17.106cm" svg:height="6.111cm" svg:x="1.973cm" svg:y="4.958cm">
          <draw:image xlink:href="Pictures/100000010000020D000000BED79BF484.png" xlink:type="simple" xlink:show="embed" xlink:actuate="onLoad" draw:mime-type="image/png">
            <text:p/>
          </draw:image>
        </draw:frame>
        <draw:frame draw:style-name="gr8" draw:text-style-name="P9" draw:layer="layout" svg:width="11.29cm" svg:height="6.404cm" svg:x="4.498cm" svg:y="13.058cm">
          <draw:image xlink:href="Pictures/10000001000001C8000000C9FFA03BC5.png" xlink:type="simple" xlink:show="embed" xlink:actuate="onLoad" draw:mime-type="image/png">
            <text:p/>
          </draw:image>
        </draw:frame>
        <draw:frame draw:style-name="gr8" draw:text-style-name="P9" draw:layer="layout" svg:width="13.071cm" svg:height="5.714cm" svg:x="4.112cm" svg:y="21.45cm">
          <draw:image xlink:href="Pictures/10000001000002F90000011CF8A943D8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11.123cm" svg:y="28.311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47">
        <draw:frame draw:style-name="gr3" draw:text-style-name="P4" draw:layer="layout" svg:width="2.419cm" svg:height="0.547cm" svg:x="3.248cm" svg:y="1.849cm">
          <draw:text-box>
            <text:p text:style-name="P1"><text:span text:style-name="T4">Задание 2. </text:span></text:p>
          </draw:text-box>
        </draw:frame>
        <draw:frame draw:style-name="gr3" draw:text-style-name="P4" draw:layer="layout" svg:width="0.494cm" svg:height="0.547cm" svg:x="1.249cm" svg:y="3.005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4cm" svg:height="0.556cm" svg:x="1.621cm" svg:y="2.99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2.073cm" svg:height="0.547cm" svg:x="2.249cm" svg:y="3.005cm">
          <draw:text-box>
            <text:p text:style-name="P1"><text:span text:style-name="T9">Создайте </text:span></text:p>
          </draw:text-box>
        </draw:frame>
        <draw:frame draw:style-name="gr3" draw:text-style-name="P4" draw:layer="layout" svg:width="1.687cm" svg:height="0.547cm" svg:x="4.522cm" svg:y="3.005cm">
          <draw:text-box>
            <text:p text:style-name="P1"><text:span text:style-name="T9">группы </text:span></text:p>
          </draw:text-box>
        </draw:frame>
        <draw:frame draw:style-name="gr3" draw:text-style-name="P4" draw:layer="layout" svg:width="1.653cm" svg:height="0.547cm" svg:x="6.404cm" svg:y="3.005cm">
          <draw:text-box>
            <text:p text:style-name="P1"><text:span text:style-name="T9">group1, </text:span></text:p>
          </draw:text-box>
        </draw:frame>
        <draw:frame draw:style-name="gr3" draw:text-style-name="P4" draw:layer="layout" svg:width="1.653cm" svg:height="0.547cm" svg:x="8.255cm" svg:y="3.005cm">
          <draw:text-box>
            <text:p text:style-name="P1"><text:span text:style-name="T9">group2, </text:span></text:p>
          </draw:text-box>
        </draw:frame>
        <draw:frame draw:style-name="gr3" draw:text-style-name="P4" draw:layer="layout" svg:width="1.653cm" svg:height="0.547cm" svg:x="10.108cm" svg:y="3.005cm">
          <draw:text-box>
            <text:p text:style-name="P1"><text:span text:style-name="T9">group3. </text:span></text:p>
          </draw:text-box>
        </draw:frame>
        <draw:frame draw:style-name="gr3" draw:text-style-name="P4" draw:layer="layout" svg:width="2.295cm" svg:height="0.547cm" svg:x="11.957cm" svg:y="3.005cm">
          <draw:text-box>
            <text:p text:style-name="P1"><text:span text:style-name="T9">Назначьте </text:span></text:p>
          </draw:text-box>
        </draw:frame>
        <draw:frame draw:style-name="gr3" draw:text-style-name="P4" draw:layer="layout" svg:width="1.579cm" svg:height="0.547cm" svg:x="14.45cm" svg:y="3.005cm">
          <draw:text-box>
            <text:p text:style-name="P1"><text:span text:style-name="T9">пароль </text:span></text:p>
          </draw:text-box>
        </draw:frame>
        <draw:frame draw:style-name="gr3" draw:text-style-name="P4" draw:layer="layout" svg:width="1.574cm" svg:height="0.547cm" svg:x="16.227cm" svg:y="3.005cm">
          <draw:text-box>
            <text:p text:style-name="P1"><text:span text:style-name="T9">группе </text:span></text:p>
          </draw:text-box>
        </draw:frame>
        <draw:frame draw:style-name="gr3" draw:text-style-name="P4" draw:layer="layout" svg:width="1.529cm" svg:height="0.547cm" svg:x="17.999cm" svg:y="3.005cm">
          <draw:text-box>
            <text:p text:style-name="P1"><text:span text:style-name="T9">group3 </text:span></text:p>
          </draw:text-box>
        </draw:frame>
        <draw:frame draw:style-name="gr3" draw:text-style-name="P4" draw:layer="layout" svg:width="0.494cm" svg:height="0.547cm" svg:x="19.727cm" svg:y="3.005cm">
          <draw:text-box>
            <text:p text:style-name="P1"><text:span text:style-name="T9">и </text:span></text:p>
          </draw:text-box>
        </draw:frame>
        <draw:polygon draw:style-name="gr5" draw:text-style-name="P6" draw:layer="layout" svg:width="21.001cm" svg:height="3.049cm" svg:x="0cm" svg:y="4.306cm" svg:viewBox="0 0 21002 3050" draw:points="0,0 21002,0 21002,3050 0,3050">
          <text:p/>
        </draw:polygon>
        <draw:frame draw:style-name="gr3" draw:text-style-name="P4" draw:layer="layout" svg:width="10.545cm" svg:height="0.547cm" svg:x="1.249cm" svg:y="3.746cm">
          <draw:text-box>
            <text:p text:style-name="P1"><text:span text:style-name="T9">сделайте её администратором пользователя user1 </text:span></text:p>
          </draw:text-box>
        </draw:frame>
        <draw:frame draw:style-name="gr1" draw:text-style-name="P2" draw:layer="layout" svg:width="0.422cm" svg:height="0.471cm" svg:x="19.735cm" svg:y="6.97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4.241cm" svg:height="0.547cm" svg:x="3.459cm" svg:y="7.573cm">
          <draw:text-box>
            <text:p text:style-name="P1"><text:span text:style-name="T6">Рисунок 4 – Создание групп, назначение пароля и администратора </text:span></text:p>
          </draw:text-box>
        </draw:frame>
        <draw:frame draw:style-name="gr3" draw:text-style-name="P4" draw:layer="layout" svg:width="0.494cm" svg:height="0.547cm" svg:x="1.249cm" svg:y="9.026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4cm" svg:height="0.556cm" svg:x="1.621cm" svg:y="9.01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1.001cm" svg:height="3.09cm" svg:x="0cm" svg:y="10.009cm" svg:viewBox="0 0 21002 3091" draw:points="0,0 21002,0 21002,3091 0,3091">
          <text:p/>
        </draw:polygon>
        <draw:frame draw:style-name="gr3" draw:text-style-name="P4" draw:layer="layout" svg:width="13.177cm" svg:height="0.547cm" svg:x="2.249cm" svg:y="9.026cm">
          <draw:text-box>
            <text:p text:style-name="P1"><text:span text:style-name="T9">Включите пользователей user1, user2 в группы group1, group2 </text:span></text:p>
          </draw:text-box>
        </draw:frame>
        <draw:frame draw:style-name="gr3" draw:text-style-name="P4" draw:layer="layout" svg:width="0.494cm" svg:height="0.547cm" svg:x="15.476cm" svg:y="12.658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73cm" svg:height="0.741cm" svg:x="1.176cm" svg:y="14.585cm" svg:viewBox="0 0 18874 742" draw:points="0,0 18874,0 18874,742 0,742">
          <text:p/>
        </draw:polygon>
        <draw:frame draw:style-name="gr3" draw:text-style-name="P4" draw:layer="layout" svg:width="10.669cm" svg:height="0.547cm" svg:x="5.246cm" svg:y="13.319cm">
          <draw:text-box>
            <text:p text:style-name="P1"><text:span text:style-name="T6">Рисунок 5 – <text:s/>Результат groups user1 и groups user2 </text:span></text:p>
          </draw:text-box>
        </draw:frame>
        <draw:frame draw:style-name="gr3" draw:text-style-name="P4" draw:layer="layout" svg:width="0.494cm" svg:height="0.547cm" svg:x="1.228cm" svg:y="14.767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4cm" svg:height="0.556cm" svg:x="1.6cm" svg:y="14.76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73cm" svg:height="0.741cm" svg:x="1.176cm" svg:y="15.326cm" svg:viewBox="0 0 18874 742" draw:points="0,0 18874,0 18874,742 0,742">
          <text:p/>
        </draw:polygon>
        <draw:frame draw:style-name="gr3" draw:text-style-name="P4" draw:layer="layout" svg:width="17.971cm" svg:height="0.547cm" svg:x="2.249cm" svg:y="14.767cm">
          <draw:text-box>
            <text:p text:style-name="P1"><text:span text:style-name="T9">Войдите <text:s/>в <text:s/>систему <text:s/>под <text:s/>user2 <text:s/>и <text:s/>получите <text:s/>права <text:s/>группы <text:s/>group3. <text:s/>Проверьте, <text:s/>что </text:span></text:p>
          </draw:text-box>
        </draw:frame>
        <draw:polygon draw:style-name="gr5" draw:text-style-name="P6" draw:layer="layout" svg:width="21.001cm" svg:height="3.577cm" svg:x="0cm" svg:y="16.491cm" svg:viewBox="0 0 21002 3578" draw:points="0,0 21002,0 21002,3578 0,3578">
          <text:p/>
        </draw:polygon>
        <draw:frame draw:style-name="gr3" draw:text-style-name="P4" draw:layer="layout" svg:width="13.802cm" svg:height="0.547cm" svg:x="1.249cm" svg:y="15.508cm">
          <draw:text-box>
            <text:p text:style-name="P1"><text:span text:style-name="T9">после ввода пароля user2 состоит в group3. Выйдите из системы. </text:span></text:p>
          </draw:text-box>
        </draw:frame>
        <draw:frame draw:style-name="gr3" draw:text-style-name="P4" draw:layer="layout" svg:width="0.494cm" svg:height="0.547cm" svg:x="13.621cm" svg:y="19.627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64cm" svg:height="0.742cm" svg:x="1.193cm" svg:y="21.554cm" svg:viewBox="0 0 18865 743" draw:points="0,0 18865,0 18865,743 0,743">
          <text:p/>
        </draw:polygon>
        <draw:frame draw:style-name="gr3" draw:text-style-name="P4" draw:layer="layout" svg:width="13.001cm" svg:height="0.547cm" svg:x="4.082cm" svg:y="20.288cm">
          <draw:text-box>
            <text:p text:style-name="P1"><text:span text:style-name="T6">Рисунок 6 – Процесс newgrp с вводом пароля и вывод groups</text:span><text:span text:style-name="T9"> </text:span></text:p>
          </draw:text-box>
        </draw:frame>
        <draw:frame draw:style-name="gr3" draw:text-style-name="P4" draw:layer="layout" svg:width="0.494cm" svg:height="0.547cm" svg:x="1.245cm" svg:y="21.736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4cm" svg:height="0.556cm" svg:x="1.617cm" svg:y="21.72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64cm" svg:height="0.741cm" svg:x="1.193cm" svg:y="22.296cm" svg:viewBox="0 0 18865 742" draw:points="0,0 18865,0 18865,742 0,742">
          <text:p/>
        </draw:polygon>
        <draw:frame draw:style-name="gr3" draw:text-style-name="P4" draw:layer="layout" svg:width="17.627cm" svg:height="0.547cm" svg:x="2.249cm" svg:y="21.736cm">
          <draw:text-box>
            <text:p text:style-name="P1"><text:span text:style-name="T9">Войдите <text:s/>в <text:s/>систему <text:s/>под <text:s/>user1 <text:s/>и <text:s/>включите <text:s/>user2 <text:s/>в <text:s/>группу <text:s/>group3. <text:s/>Выйдите <text:s/>из </text:span></text:p>
          </draw:text-box>
        </draw:frame>
        <draw:polygon draw:style-name="gr5" draw:text-style-name="P6" draw:layer="layout" svg:width="21.001cm" svg:height="2.137cm" svg:x="0cm" svg:y="23.037cm" svg:viewBox="0 0 21002 2138" draw:points="0,0 21002,0 21002,2138 0,2138">
          <text:p/>
        </draw:polygon>
        <draw:frame draw:style-name="gr3" draw:text-style-name="P4" draw:layer="layout" svg:width="2.037cm" svg:height="0.547cm" svg:x="1.249cm" svg:y="22.477cm">
          <draw:text-box>
            <text:p text:style-name="P1"><text:span text:style-name="T9">системы. </text:span></text:p>
          </draw:text-box>
        </draw:frame>
        <draw:frame draw:style-name="gr3" draw:text-style-name="P4" draw:layer="layout" svg:width="0.494cm" svg:height="0.547cm" svg:x="17.199cm" svg:y="24.734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7.852cm" svg:height="0.741cm" svg:x="2.197cm" svg:y="26.66cm" svg:viewBox="0 0 17853 742" draw:points="0,0 17853,0 17853,742 0,742">
          <text:p/>
        </draw:polygon>
        <draw:frame draw:style-name="gr3" draw:text-style-name="P4" draw:layer="layout" svg:width="10.778cm" svg:height="0.547cm" svg:x="5.191cm" svg:y="25.394cm">
          <draw:text-box>
            <text:p text:style-name="P1"><text:span text:style-name="T6">Рисунок 7 – Добавление user2 в group3 и проверка </text:span></text:p>
          </draw:text-box>
        </draw:frame>
        <draw:frame draw:style-name="gr8" draw:text-style-name="P9" draw:layer="layout" svg:width="18.396cm" svg:height="3.047cm" svg:x="1.32cm" svg:y="4.307cm">
          <draw:image xlink:href="Pictures/10000001000002F0000000DCE7BF4976.png" xlink:type="simple" xlink:show="embed" xlink:actuate="onLoad" draw:mime-type="image/png">
            <text:p/>
          </draw:image>
        </draw:frame>
        <draw:frame draw:style-name="gr8" draw:text-style-name="P9" draw:layer="layout" svg:width="9.896cm" svg:height="3.089cm" svg:x="5.578cm" svg:y="10.007cm">
          <draw:image xlink:href="Pictures/100000010000021C0000007ACC4E3FED.png" xlink:type="simple" xlink:show="embed" xlink:actuate="onLoad" draw:mime-type="image/png">
            <text:p/>
          </draw:image>
        </draw:frame>
        <draw:frame draw:style-name="gr8" draw:text-style-name="P9" draw:layer="layout" svg:width="6.181cm" svg:height="3.576cm" svg:x="7.432cm" svg:y="16.488cm">
          <draw:image xlink:href="Pictures/100000010000015D000000C5475BCE51.png" xlink:type="simple" xlink:show="embed" xlink:actuate="onLoad" draw:mime-type="image/png">
            <text:p/>
          </draw:image>
        </draw:frame>
        <draw:frame draw:style-name="gr8" draw:text-style-name="P9" draw:layer="layout" svg:width="13.317cm" svg:height="2.137cm" svg:x="3.862cm" svg:y="23.034cm">
          <draw:image xlink:href="Pictures/10000001000001CB00000079E1B30A49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2.249cm" svg:y="26.842cm">
          <draw:text-box>
            <text:p text:style-name="P1"><text:span text:style-name="T9"><text:s/></text:span></text:p>
          </draw:text-box>
        </draw:frame>
      </draw:page>
      <draw:page draw:name="page4" draw:style-name="dp1" draw:master-page-name="master-page47">
        <draw:frame draw:style-name="gr3" draw:text-style-name="P4" draw:layer="layout" svg:width="2.419cm" svg:height="0.547cm" svg:x="3.248cm" svg:y="1.849cm">
          <draw:text-box>
            <text:p text:style-name="P1"><text:span text:style-name="T4">Задание 3. </text:span></text:p>
          </draw:text-box>
        </draw:frame>
        <draw:frame draw:style-name="gr3" draw:text-style-name="P4" draw:layer="layout" svg:width="0.494cm" svg:height="0.547cm" svg:x="1.228cm" svg:y="3.005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4cm" svg:height="0.556cm" svg:x="1.6cm" svg:y="2.998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1.001cm" svg:height="3.225cm" svg:x="0cm" svg:y="3.565cm" svg:viewBox="0 0 21002 3226" draw:points="0,0 21002,0 21002,3226 0,3226">
          <text:p/>
        </draw:polygon>
        <draw:frame draw:style-name="gr3" draw:text-style-name="P4" draw:layer="layout" svg:width="7.157cm" svg:height="0.547cm" svg:x="2.249cm" svg:y="3.005cm">
          <draw:text-box>
            <text:p text:style-name="P1"><text:span text:style-name="T9">Заблокируйте пользователя user2 </text:span></text:p>
          </draw:text-box>
        </draw:frame>
        <draw:frame draw:style-name="gr1" draw:text-style-name="P2" draw:layer="layout" svg:width="0.422cm" svg:height="0.471cm" svg:x="19.481cm" svg:y="6.41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18.859cm" svg:height="0.741cm" svg:x="1.198cm" svg:y="8.276cm" svg:viewBox="0 0 18860 742" draw:points="0,0 18860,0 18860,742 0,742">
          <text:p/>
        </draw:polygon>
        <draw:frame draw:style-name="gr3" draw:text-style-name="P4" draw:layer="layout" svg:width="18.331cm" svg:height="0.547cm" svg:x="1.422cm" svg:y="7.01cm">
          <draw:text-box>
            <text:p text:style-name="P1"><text:span text:style-name="T6">Рисунок 8 – попытка входа заблокированного пользователя и содержимое /etc/shadow </text:span></text:p>
          </draw:text-box>
        </draw:frame>
        <draw:frame draw:style-name="gr3" draw:text-style-name="P4" draw:layer="layout" svg:width="0.494cm" svg:height="0.547cm" svg:x="1.249cm" svg:y="8.458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4cm" svg:height="0.556cm" svg:x="1.621cm" svg:y="8.451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59cm" svg:height="0.742cm" svg:x="1.198cm" svg:y="9.017cm" svg:viewBox="0 0 18860 743" draw:points="0,0 18860,0 18860,743 0,743">
          <text:p/>
        </draw:polygon>
        <draw:frame draw:style-name="gr3" draw:text-style-name="P4" draw:layer="layout" svg:width="18.094cm" svg:height="0.547cm" svg:x="2.249cm" svg:y="8.458cm">
          <draw:text-box>
            <text:p text:style-name="P1"><text:span text:style-name="T9">Принудительно <text:s/>заставьте <text:s/>пользователя <text:s/>user1 <text:s/>сменить <text:s/>свой <text:s/>пароль. <text:s/>Войдите <text:s/>под </text:span></text:p>
          </draw:text-box>
        </draw:frame>
        <draw:frame draw:style-name="gr3" draw:text-style-name="P4" draw:layer="layout" svg:width="9.88cm" svg:height="0.547cm" svg:x="1.249cm" svg:y="9.2cm">
          <draw:text-box>
            <text:p text:style-name="P1"><text:span text:style-name="T9">user1 и смените пароль. Выйдите из системы. <text:s/></text:span></text:p>
          </draw:text-box>
        </draw:frame>
        <draw:frame draw:style-name="gr3" draw:text-style-name="P4" draw:layer="layout" svg:width="0.494cm" svg:height="0.547cm" svg:x="12.241cm" svg:y="9.2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59cm" svg:height="11.469cm" svg:x="1.198cm" svg:y="9.759cm" svg:viewBox="0 0 18860 11470" draw:points="0,0 18860,0 18860,11470 0,11470">
          <text:p/>
        </draw:polygon>
        <draw:frame draw:style-name="gr3" draw:text-style-name="P4" draw:layer="layout" svg:width="0.494cm" svg:height="0.547cm" svg:x="13.49cm" svg:y="9.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18.431cm" svg:y="20.787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554cm" svg:height="0.547cm" svg:x="3.806cm" svg:y="21.449cm">
          <draw:text-box>
            <text:p text:style-name="P1"><text:span text:style-name="T6">Рисунок 9 – <text:s/>Процесс принудительной смены пароля при входе</text:span><text:span text:style-name="T9"> </text:span></text:p>
          </draw:text-box>
        </draw:frame>
        <draw:frame draw:style-name="gr3" draw:text-style-name="P4" draw:layer="layout" svg:width="0.494cm" svg:height="0.547cm" svg:x="1.228cm" svg:y="22.896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4cm" svg:height="0.556cm" svg:x="1.6cm" svg:y="22.88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812cm" svg:height="0.547cm" svg:x="2.249cm" svg:y="22.896cm">
          <draw:text-box>
            <text:p text:style-name="P1"><text:span text:style-name="T9">Смените <text:s/>имя <text:s/>пользователя <text:s/>user2 <text:s/>на <text:s/>user3. <text:s/>Разблокируйте <text:s/>пользователя <text:s/>user3 <text:s/>и </text:span></text:p>
          </draw:text-box>
        </draw:frame>
        <draw:polygon draw:style-name="gr5" draw:text-style-name="P6" draw:layer="layout" svg:width="16.582cm" svg:height="0.74cm" svg:x="3.467cm" svg:y="24.197cm" svg:viewBox="0 0 16583 741" draw:points="0,0 16583,0 16583,741 0,741">
          <text:p/>
        </draw:polygon>
        <draw:frame draw:style-name="gr3" draw:text-style-name="P4" draw:layer="layout" svg:width="7.537cm" svg:height="0.547cm" svg:x="1.249cm" svg:y="23.637cm">
          <draw:text-box>
            <text:p text:style-name="P1"><text:span text:style-name="T9">войдите в систему под его именем. </text:span></text:p>
          </draw:text-box>
        </draw:frame>
        <draw:polygon draw:style-name="gr5" draw:text-style-name="P6" draw:layer="layout" svg:width="21.001cm" svg:height="2.556cm" svg:x="0cm" svg:y="25.361cm" svg:viewBox="0 0 21002 2557" draw:points="0,0 21002,0 21002,2557 0,2557">
          <text:p/>
        </draw:polygon>
        <draw:frame draw:style-name="gr3" draw:text-style-name="P4" draw:layer="layout" svg:width="0.494cm" svg:height="0.547cm" svg:x="3.519cm" svg:y="24.37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16.641cm" svg:y="27.477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17.9cm" svg:height="3.222cm" svg:x="1.573cm" svg:y="3.567cm">
          <draw:image xlink:href="Pictures/10000001000002F5000000B9711C207A.png" xlink:type="simple" xlink:show="embed" xlink:actuate="onLoad" draw:mime-type="image/png">
            <text:p/>
          </draw:image>
        </draw:frame>
        <draw:frame draw:style-name="gr8" draw:text-style-name="P9" draw:layer="layout" svg:width="15.552cm" svg:height="11.468cm" svg:x="2.873cm" svg:y="9.758cm">
          <draw:image xlink:href="Pictures/10000001000002F500000153A4E1D6DB.png" xlink:type="simple" xlink:show="embed" xlink:actuate="onLoad" draw:mime-type="image/png">
            <text:p/>
          </draw:image>
        </draw:frame>
        <draw:frame draw:style-name="gr8" draw:text-style-name="P9" draw:layer="layout" svg:width="12.22cm" svg:height="2.555cm" svg:x="4.416cm" svg:y="25.359cm">
          <draw:image xlink:href="Pictures/100000010000019D00000057E204D668.png" xlink:type="simple" xlink:show="embed" xlink:actuate="onLoad" draw:mime-type="image/png">
            <text:p/>
          </draw:image>
        </draw:frame>
        <draw:frame draw:style-name="gr3" draw:text-style-name="P4" draw:layer="layout" svg:width="15.575cm" svg:height="0.547cm" svg:x="2.795cm" svg:y="28.138cm">
          <draw:text-box>
            <text:p text:style-name="P1"><text:span text:style-name="T6">Рисунок 10 – Процесс переименования, разблокировки и входа под user3</text:span><text:span text:style-name="T9"> </text:span></text:p>
          </draw:text-box>
        </draw:frame>
      </draw:page>
      <draw:page draw:name="page5" draw:style-name="dp1" draw:master-page-name="master-page54">
        <draw:polygon draw:style-name="gr5" draw:text-style-name="P6" draw:layer="layout" svg:width="18.851cm" svg:height="0.74cm" svg:x="1.198cm" svg:y="1.833cm" svg:viewBox="0 0 18852 741" draw:points="0,0 18852,0 18852,741 0,741">
          <text:p/>
        </draw:polygon>
        <draw:frame draw:style-name="gr3" draw:text-style-name="P4" draw:layer="layout" svg:width="0.494cm" svg:height="0.547cm" svg:x="1.249cm" svg:y="2.014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4cm" svg:height="0.556cm" svg:x="1.621cm" svg:y="2.007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51cm" svg:height="0.742cm" svg:x="1.198cm" svg:y="2.573cm" svg:viewBox="0 0 18852 743" draw:points="0,0 18852,0 18852,743 0,743">
          <text:p/>
        </draw:polygon>
        <draw:frame draw:style-name="gr3" draw:text-style-name="P4" draw:layer="layout" svg:width="17.756cm" svg:height="0.547cm" svg:x="2.249cm" svg:y="2.014cm">
          <draw:text-box>
            <text:p text:style-name="P1"><text:span text:style-name="T9">Перенесите домашние каталоги пользователей user1, user3 в /mnt/home. Проверьте, </text:span></text:p>
          </draw:text-box>
        </draw:frame>
        <draw:polygon draw:style-name="gr5" draw:text-style-name="P6" draw:layer="layout" svg:width="21.001cm" svg:height="4.483cm" svg:x="0cm" svg:y="3.738cm" svg:viewBox="0 0 21002 4484" draw:points="0,0 21002,0 21002,4484 0,4484">
          <text:p/>
        </draw:polygon>
        <draw:frame draw:style-name="gr3" draw:text-style-name="P4" draw:layer="layout" svg:width="11.024cm" svg:height="0.547cm" svg:x="1.249cm" svg:y="2.756cm">
          <draw:text-box>
            <text:p text:style-name="P1"><text:span text:style-name="T9">что домашние каталоги были успешно перенесены. </text:span></text:p>
          </draw:text-box>
        </draw:frame>
        <draw:frame draw:style-name="gr3" draw:text-style-name="P4" draw:layer="layout" svg:width="0.494cm" svg:height="0.547cm" svg:x="15.768cm" svg:y="7.781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7.852cm" svg:height="0.741cm" svg:x="2.197cm" svg:y="9.708cm" svg:viewBox="0 0 17853 742" draw:points="0,0 17853,0 17853,742 0,742">
          <text:p/>
        </draw:polygon>
        <draw:frame draw:style-name="gr3" draw:text-style-name="P4" draw:layer="layout" svg:width="16.98cm" svg:height="0.547cm" svg:x="2.096cm" svg:y="8.441cm">
          <draw:text-box>
            <text:p text:style-name="P1"><text:span text:style-name="T6">Рисунок 11 – Вывод ls -l /mnt/home и содержимое /etc/passwd с новыми путями. </text:span></text:p>
          </draw:text-box>
        </draw:frame>
        <draw:frame draw:style-name="gr8" draw:text-style-name="P9" draw:layer="layout" svg:width="10.477cm" svg:height="4.481cm" svg:x="5.286cm" svg:y="3.739cm">
          <draw:image xlink:href="Pictures/10000001000002460000010704D8B31E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2.249cm" svg:y="9.89cm">
          <draw:text-box>
            <text:p text:style-name="P1"><text:span text:style-name="T9"><text:s/></text:span></text:p>
          </draw:text-box>
        </draw:frame>
      </draw:page>
      <draw:page draw:name="page6" draw:style-name="dp1" draw:master-page-name="master-page47">
        <draw:polygon draw:style-name="gr5" draw:text-style-name="P6" draw:layer="layout" svg:width="18.859cm" svg:height="0.742cm" svg:x="1.198cm" svg:y="2.823cm" svg:viewBox="0 0 18860 743" draw:points="0,0 18860,0 18860,743 0,743">
          <text:p/>
        </draw:polygon>
        <draw:frame draw:style-name="gr3" draw:text-style-name="P4" draw:layer="layout" svg:width="2.419cm" svg:height="0.547cm" svg:x="3.248cm" svg:y="1.849cm">
          <draw:text-box>
            <text:p text:style-name="P1"><text:span text:style-name="T4">Задание 4. </text:span></text:p>
          </draw:text-box>
        </draw:frame>
        <draw:frame draw:style-name="gr3" draw:text-style-name="P4" draw:layer="layout" svg:width="0.494cm" svg:height="0.547cm" svg:x="1.249cm" svg:y="3.005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4cm" svg:height="0.556cm" svg:x="1.621cm" svg:y="2.99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8.411cm" svg:height="0.547cm" svg:x="2.249cm" svg:y="3.005cm">
          <draw:text-box>
            <text:p text:style-name="P1"><text:span text:style-name="T9">Удалите группы group1, group2, group3 </text:span></text:p>
          </draw:text-box>
        </draw:frame>
        <draw:frame draw:style-name="gr3" draw:text-style-name="P4" draw:layer="layout" svg:width="0.494cm" svg:height="0.547cm" svg:x="10.992cm" svg:y="3.005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59cm" svg:height="2.468cm" svg:x="1.198cm" svg:y="3.565cm" svg:viewBox="0 0 18860 2469" draw:points="0,0 18860,0 18860,2469 0,2469">
          <text:p/>
        </draw:polygon>
        <draw:frame draw:style-name="gr1" draw:text-style-name="P2" draw:layer="layout" svg:width="0.422cm" svg:height="0.471cm" svg:x="12.241cm" svg:y="3.06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15.798cm" svg:y="5.65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8.828cm" svg:height="0.547cm" svg:x="6.16cm" svg:y="6.252cm">
          <draw:text-box>
            <text:p text:style-name="P1"><text:span text:style-name="T6">Рисунок 12 – Удаление групп и проверка </text:span></text:p>
          </draw:text-box>
        </draw:frame>
        <draw:frame draw:style-name="gr3" draw:text-style-name="P4" draw:layer="layout" svg:width="0.494cm" svg:height="0.547cm" svg:x="1.249cm" svg:y="7.7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4cm" svg:height="0.556cm" svg:x="1.621cm" svg:y="7.693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1.001cm" svg:height="3.091cm" svg:x="0cm" svg:y="8.683cm" svg:viewBox="0 0 21002 3092" draw:points="0,0 21002,0 21002,3092 0,3092">
          <text:p/>
        </draw:polygon>
        <draw:frame draw:style-name="gr3" draw:text-style-name="P4" draw:layer="layout" svg:width="15.28cm" svg:height="0.547cm" svg:x="2.249cm" svg:y="7.7cm">
          <draw:text-box>
            <text:p text:style-name="P1"><text:span text:style-name="T9">Удалите пользователей user1, user3 вместе с их домашними каталогами </text:span></text:p>
          </draw:text-box>
        </draw:frame>
        <draw:frame draw:style-name="gr3" draw:text-style-name="P4" draw:layer="layout" svg:width="0.494cm" svg:height="0.547cm" svg:x="16.086cm" svg:y="11.33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0.775cm" svg:height="0.547cm" svg:x="5.191cm" svg:y="11.994cm">
          <draw:text-box>
            <text:p text:style-name="P1"><text:span text:style-name="T6">Рисунок 13 – <text:s/>Удаление пользователей и проверка </text:span></text:p>
          </draw:text-box>
        </draw:frame>
        <draw:frame draw:style-name="gr3" draw:text-style-name="P4" draw:layer="layout" svg:width="0.494cm" svg:height="0.547cm" svg:x="17.673cm" svg:y="13.98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545cm" svg:height="0.547cm" svg:x="6.304cm" svg:y="14.72cm">
          <draw:text-box>
            <text:p text:style-name="P1"><text:span text:style-name="T6">Рисунок 14 – Дополнительная проверка </text:span></text:p>
          </draw:text-box>
        </draw:frame>
        <draw:polygon draw:style-name="gr5" draw:text-style-name="P6" draw:layer="layout" svg:width="17.852cm" svg:height="0.952cm" svg:x="2.197cm" svg:y="16.838cm" svg:viewBox="0 0 17853 953" draw:points="0,0 17853,0 17853,953 0,953">
          <text:p/>
        </draw:polygon>
        <draw:frame draw:style-name="gr3" draw:text-style-name="P4" draw:layer="layout" svg:width="0.494cm" svg:height="0.547cm" svg:x="10.5cm" svg:y="15.572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7.852cm" svg:height="1.165cm" svg:x="2.197cm" svg:y="17.79cm" svg:viewBox="0 0 17853 1166" draw:points="0,0 17853,0 17853,1166 0,1166">
          <text:p/>
        </draw:polygon>
        <draw:frame draw:style-name="gr3" draw:text-style-name="P4" draw:layer="layout" svg:width="0.494cm" svg:height="0.547cm" svg:x="2.249cm" svg:y="17.019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7.852cm" svg:height="0.952cm" svg:x="2.197cm" svg:y="18.955cm" svg:viewBox="0 0 17853 953" draw:points="0,0 17853,0 17853,953 0,953">
          <text:p/>
        </draw:polygon>
        <draw:frame draw:style-name="gr3" draw:text-style-name="P4" draw:layer="layout" svg:width="0.494cm" svg:height="0.547cm" svg:x="2.249cm" svg:y="18.18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2.249cm" svg:y="19.34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2.249cm" svg:y="20.12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0.97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1.8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2.68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3.53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4.38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5.23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6.09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6.94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4cm" svg:height="0.547cm" svg:x="2.249cm" svg:y="27.79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0.282cm" svg:height="2.465cm" svg:x="5.51cm" svg:y="3.567cm">
          <draw:image xlink:href="Pictures/10000001000001C9000000642970CC45.png" xlink:type="simple" xlink:show="embed" xlink:actuate="onLoad" draw:mime-type="image/png">
            <text:p/>
          </draw:image>
        </draw:frame>
        <draw:frame draw:style-name="gr8" draw:text-style-name="P9" draw:layer="layout" svg:width="11.101cm" svg:height="3.089cm" svg:x="4.971cm" svg:y="8.684cm">
          <draw:image xlink:href="Pictures/10000001000002360000005353E4206D.png" xlink:type="simple" xlink:show="embed" xlink:actuate="onLoad" draw:mime-type="image/png">
            <text:p/>
          </draw:image>
        </draw:frame>
        <draw:frame draw:style-name="gr8" draw:text-style-name="P9" draw:layer="layout" svg:width="14.287cm" svg:height="1.587cm" svg:x="3.382cm" svg:y="12.837cm">
          <draw:image xlink:href="Pictures/10000001000002040000004F69C3D5C1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2.249cm" svg:y="28.646cm">
          <draw:text-box>
            <text:p text:style-name="P1"><text:span text:style-name="T6"><text:s/></text:span></text:p>
          </draw:text-box>
        </draw:frame>
      </draw:page>
      <draw:page draw:name="page7" draw:style-name="dp1" draw:master-page-name="master-page57">
        <draw:polygon draw:style-name="gr5" draw:text-style-name="P6" draw:layer="layout" svg:width="18.487cm" svg:height="0.568cm" svg:x="1.562cm" svg:y="2.895cm" svg:viewBox="0 0 18488 569" draw:points="0,0 18488,0 18488,569 0,569">
          <text:p/>
        </draw:polygon>
        <draw:frame draw:style-name="gr3" draw:text-style-name="P4" draw:layer="layout" svg:width="2.119cm" svg:height="0.547cm" svg:x="3.248cm" svg:y="1.849cm">
          <draw:text-box>
            <text:p text:style-name="P1"><text:span text:style-name="T4">Вопросы </text:span></text:p>
          </draw:text-box>
        </draw:frame>
        <draw:frame draw:style-name="gr3" draw:text-style-name="P4" draw:layer="layout" svg:width="0.494cm" svg:height="0.547cm" svg:x="1.613cm" svg:y="2.912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4cm" svg:height="0.556cm" svg:x="1.985cm" svg:y="2.905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3.463cm" svg:viewBox="0 0 18488 568" draw:points="0,0 18488,0 18488,568 0,568">
          <text:p/>
        </draw:polygon>
        <draw:frame draw:style-name="gr3" draw:text-style-name="P4" draw:layer="layout" svg:width="17.551cm" svg:height="0.547cm" svg:x="2.249cm" svg:y="2.912cm">
          <draw:text-box>
            <text:p text:style-name="P1"><text:span text:style-name="T12">Назовите четыре файла, в которых содержится информация о пользователях </text:span></text:p>
          </draw:text-box>
        </draw:frame>
        <draw:polygon draw:style-name="gr5" draw:text-style-name="P6" draw:layer="layout" svg:width="18.487cm" svg:height="0.572cm" svg:x="1.562cm" svg:y="4.03cm" svg:viewBox="0 0 18488 573" draw:points="0,0 18488,0 18488,573 0,573">
          <text:p/>
        </draw:polygon>
        <draw:polygon draw:style-name="gr9" draw:text-style-name="P10" draw:layer="layout" svg:width="2.307cm" svg:height="0.593cm" svg:x="3.895cm" svg:y="4.005cm" svg:viewBox="0 0 2308 594" draw:points="0,0 2308,0 2308,594 0,594">
          <text:p/>
        </draw:polygon>
        <draw:polygon draw:style-name="gr9" draw:text-style-name="P10" draw:layer="layout" svg:width="2.363cm" svg:height="0.593cm" svg:x="6.443cm" svg:y="4.005cm" svg:viewBox="0 0 2364 594" draw:points="0,0 2364,0 2364,594 0,594">
          <text:p/>
        </draw:polygon>
        <draw:polygon draw:style-name="gr9" draw:text-style-name="P10" draw:layer="layout" svg:width="2.003cm" svg:height="0.593cm" svg:x="9.052cm" svg:y="4.005cm" svg:viewBox="0 0 2004 594" draw:points="0,0 2004,0 2004,594 0,594">
          <text:p/>
        </draw:polygon>
        <draw:polygon draw:style-name="gr9" draw:text-style-name="P10" draw:layer="layout" svg:width="2.607cm" svg:height="0.593cm" svg:x="11.301cm" svg:y="4.005cm" svg:viewBox="0 0 2608 594" draw:points="0,0 2608,0 2608,594 0,594">
          <text:p/>
        </draw:polygon>
        <draw:frame draw:style-name="gr3" draw:text-style-name="P4" draw:layer="layout" svg:width="2.597cm" svg:height="0.547cm" svg:x="2.249cm" svg:y="3.479cm">
          <draw:text-box>
            <text:p text:style-name="P1"><text:span text:style-name="T12">и группах? </text:span></text:p>
          </draw:text-box>
        </draw:frame>
        <draw:polygon draw:style-name="gr5" draw:text-style-name="P6" draw:layer="layout" svg:width="18.487cm" svg:height="0.567cm" svg:x="1.562cm" svg:y="4.602cm" svg:viewBox="0 0 18488 568" draw:points="0,0 18488,0 18488,568 0,568">
          <text:p/>
        </draw:polygon>
        <draw:frame draw:style-name="gr3" draw:text-style-name="P4" draw:layer="layout" svg:width="11.939cm" svg:height="0.547cm" svg:x="2.249cm" svg:y="4.038cm">
          <draw:text-box>
            <text:p text:style-name="P1"><text:span text:style-name="T12">Ответ: </text:span><text:span text:style-name="T9">/etc/passwd, /etc/shadow, /etc/group, /etc/gshadow. </text:span></text:p>
          </draw:text-box>
        </draw:frame>
        <draw:frame draw:style-name="gr3" draw:text-style-name="P4" draw:layer="layout" svg:width="0.494cm" svg:height="0.547cm" svg:x="1.613cm" svg:y="4.618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4cm" svg:height="0.556cm" svg:x="1.985cm" svg:y="4.611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5.169cm" svg:viewBox="0 0 18488 568" draw:points="0,0 18488,0 18488,568 0,568">
          <text:p/>
        </draw:polygon>
        <draw:polygon draw:style-name="gr9" draw:text-style-name="P10" draw:layer="layout" svg:width="2.603cm" svg:height="0.592cm" svg:x="3.895cm" svg:y="5.144cm" svg:viewBox="0 0 2604 593" draw:points="0,0 2604,0 2604,593 0,593">
          <text:p/>
        </draw:polygon>
        <draw:frame draw:style-name="gr3" draw:text-style-name="P4" draw:layer="layout" svg:width="10.43cm" svg:height="0.547cm" svg:x="2.249cm" svg:y="4.618cm">
          <draw:text-box>
            <text:p text:style-name="P1"><text:span text:style-name="T12">Как называется файл бекапа для /etc/shadow? </text:span></text:p>
          </draw:text-box>
        </draw:frame>
        <draw:polygon draw:style-name="gr5" draw:text-style-name="P6" draw:layer="layout" svg:width="18.487cm" svg:height="0.568cm" svg:x="1.562cm" svg:y="5.736cm" svg:viewBox="0 0 18488 569" draw:points="0,0 18488,0 18488,569 0,569">
          <text:p/>
        </draw:polygon>
        <draw:frame draw:style-name="gr3" draw:text-style-name="P4" draw:layer="layout" svg:width="7.977cm" svg:height="0.547cm" svg:x="2.249cm" svg:y="5.177cm">
          <draw:text-box>
            <text:p text:style-name="P1"><text:span text:style-name="T12">Ответ: </text:span><text:span text:style-name="T9">/etc/shadow– (с тире в конце). </text:span></text:p>
          </draw:text-box>
        </draw:frame>
        <draw:frame draw:style-name="gr3" draw:text-style-name="P4" draw:layer="layout" svg:width="0.494cm" svg:height="0.547cm" svg:x="1.613cm" svg:y="5.753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4cm" svg:height="0.556cm" svg:x="1.985cm" svg:y="5.746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6.304cm" svg:viewBox="0 0 18488 568" draw:points="0,0 18488,0 18488,568 0,568">
          <text:p/>
        </draw:polygon>
        <draw:polygon draw:style-name="gr9" draw:text-style-name="P10" draw:layer="layout" svg:width="2.358cm" svg:height="0.593cm" svg:x="16.471cm" svg:y="6.278cm" svg:viewBox="0 0 2359 594" draw:points="0,0 2359,0 2359,594 0,594">
          <text:p/>
        </draw:polygon>
        <draw:frame draw:style-name="gr3" draw:text-style-name="P4" draw:layer="layout" svg:width="11.894cm" svg:height="0.547cm" svg:x="2.249cm" svg:y="5.753cm">
          <draw:text-box>
            <text:p text:style-name="P1"><text:span text:style-name="T12">Что означает «x» в поле пароля в файле /etc/passwd? </text:span></text:p>
          </draw:text-box>
        </draw:frame>
        <draw:polygon draw:style-name="gr5" draw:text-style-name="P6" draw:layer="layout" svg:width="18.487cm" svg:height="0.567cm" svg:x="1.562cm" svg:y="6.871cm" svg:viewBox="0 0 18488 568" draw:points="0,0 18488,0 18488,568 0,568">
          <text:p/>
        </draw:polygon>
        <draw:frame draw:style-name="gr3" draw:text-style-name="P4" draw:layer="layout" svg:width="16.868cm" svg:height="0.547cm" svg:x="2.249cm" svg:y="6.312cm">
          <draw:text-box>
            <text:p text:style-name="P1"><text:span text:style-name="T12">Ответ: </text:span><text:span text:style-name="T9">Это означает, что настоящий хеш пароля хранится в файле /etc/shadow <text:s/></text:span></text:p>
          </draw:text-box>
        </draw:frame>
        <draw:frame draw:style-name="gr3" draw:text-style-name="P4" draw:layer="layout" svg:width="0.494cm" svg:height="0.547cm" svg:x="1.613cm" svg:y="6.887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4cm" svg:height="0.556cm" svg:x="1.985cm" svg:y="6.88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72cm" svg:x="1.562cm" svg:y="7.438cm" svg:viewBox="0 0 18488 573" draw:points="0,0 18488,0 18488,573 0,573">
          <text:p/>
        </draw:polygon>
        <draw:polygon draw:style-name="gr9" draw:text-style-name="P10" draw:layer="layout" svg:width="2.816cm" svg:height="0.592cm" svg:x="5.741cm" svg:y="7.413cm" svg:viewBox="0 0 2817 593" draw:points="0,0 2817,0 2817,593 0,593">
          <text:p/>
        </draw:polygon>
        <draw:polygon draw:style-name="gr9" draw:text-style-name="P10" draw:layer="layout" svg:width="3.388cm" svg:height="0.592cm" svg:x="13.07cm" svg:y="7.413cm" svg:viewBox="0 0 3389 593" draw:points="0,0 3389,0 3389,593 0,593">
          <text:p/>
        </draw:polygon>
        <draw:frame draw:style-name="gr3" draw:text-style-name="P4" draw:layer="layout" svg:width="13.31cm" svg:height="0.547cm" svg:x="2.249cm" svg:y="6.887cm">
          <draw:text-box>
            <text:p text:style-name="P1"><text:span text:style-name="T12">В каком файле хранятся настройки диапазонов UID, GID? </text:span></text:p>
          </draw:text-box>
        </draw:frame>
        <draw:polygon draw:style-name="gr5" draw:text-style-name="P6" draw:layer="layout" svg:width="18.487cm" svg:height="0.567cm" svg:x="1.562cm" svg:y="8.01cm" svg:viewBox="0 0 18488 568" draw:points="0,0 18488,0 18488,568 0,568">
          <text:p/>
        </draw:polygon>
        <draw:frame draw:style-name="gr3" draw:text-style-name="P4" draw:layer="layout" svg:width="17.008cm" svg:height="0.547cm" svg:x="2.249cm" svg:y="7.446cm">
          <draw:text-box>
            <text:p text:style-name="P1"><text:span text:style-name="T12">Ответ: </text:span><text:span text:style-name="T9">В файле /etc/login.defs. Также упоминается /etc/adduser.conf для adduser. </text:span></text:p>
          </draw:text-box>
        </draw:frame>
        <draw:frame draw:style-name="gr3" draw:text-style-name="P4" draw:layer="layout" svg:width="0.494cm" svg:height="0.547cm" svg:x="1.613cm" svg:y="8.026cm">
          <draw:text-box>
            <text:p text:style-name="P1"><text:span text:style-name="T9">5.</text:span></text:p>
          </draw:text-box>
        </draw:frame>
        <draw:frame draw:style-name="gr3" draw:text-style-name="P4" draw:layer="layout" svg:width="0.494cm" svg:height="0.556cm" svg:x="1.985cm" svg:y="8.01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8.577cm" svg:viewBox="0 0 18488 568" draw:points="0,0 18488,0 18488,568 0,568">
          <text:p/>
        </draw:polygon>
        <draw:frame draw:style-name="gr3" draw:text-style-name="P4" draw:layer="layout" svg:width="7.313cm" svg:height="0.547cm" svg:x="2.249cm" svg:y="8.026cm">
          <draw:text-box>
            <text:p text:style-name="P1"><text:span text:style-name="T12">Что делает команда useradd -D? </text:span></text:p>
          </draw:text-box>
        </draw:frame>
        <draw:polygon draw:style-name="gr5" draw:text-style-name="P6" draw:layer="layout" svg:width="18.487cm" svg:height="0.569cm" svg:x="1.562cm" svg:y="9.144cm" svg:viewBox="0 0 18488 570" draw:points="0,0 18488,0 18488,570 0,570">
          <text:p/>
        </draw:polygon>
        <draw:frame draw:style-name="gr3" draw:text-style-name="P4" draw:layer="layout" svg:width="15.072cm" svg:height="0.547cm" svg:x="2.249cm" svg:y="8.585cm">
          <draw:text-box>
            <text:p text:style-name="P1"><text:span text:style-name="T12">Ответ: </text:span><text:span text:style-name="T9">Выводит значения по умолчанию, используемые при создании </text:span></text:p>
          </draw:text-box>
        </draw:frame>
        <draw:polygon draw:style-name="gr5" draw:text-style-name="P6" draw:layer="layout" svg:width="18.487cm" svg:height="0.567cm" svg:x="1.562cm" svg:y="9.713cm" svg:viewBox="0 0 18488 568" draw:points="0,0 18488,0 18488,568 0,568">
          <text:p/>
        </draw:polygon>
        <draw:frame draw:style-name="gr3" draw:text-style-name="P4" draw:layer="layout" svg:width="10.397cm" svg:height="0.547cm" svg:x="2.249cm" svg:y="9.153cm">
          <draw:text-box>
            <text:p text:style-name="P1"><text:span text:style-name="T9">пользователя (например, SHELL, HOME, SKEL) </text:span></text:p>
          </draw:text-box>
        </draw:frame>
        <draw:frame draw:style-name="gr3" draw:text-style-name="P4" draw:layer="layout" svg:width="0.494cm" svg:height="0.547cm" svg:x="1.613cm" svg:y="9.729cm">
          <draw:text-box>
            <text:p text:style-name="P1"><text:span text:style-name="T9">6.</text:span></text:p>
          </draw:text-box>
        </draw:frame>
        <draw:frame draw:style-name="gr3" draw:text-style-name="P4" draw:layer="layout" svg:width="0.494cm" svg:height="0.556cm" svg:x="1.985cm" svg:y="9.72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10.28cm" svg:viewBox="0 0 18488 568" draw:points="0,0 18488,0 18488,568 0,568">
          <text:p/>
        </draw:polygon>
        <draw:frame draw:style-name="gr3" draw:text-style-name="P4" draw:layer="layout" svg:width="15.787cm" svg:height="0.547cm" svg:x="2.249cm" svg:y="9.729cm">
          <draw:text-box>
            <text:p text:style-name="P1"><text:span text:style-name="T12">Какой UID присвоится первому созданному пользователю в системе? </text:span></text:p>
          </draw:text-box>
        </draw:frame>
        <draw:polygon draw:style-name="gr5" draw:text-style-name="P6" draw:layer="layout" svg:width="18.487cm" svg:height="0.567cm" svg:x="1.562cm" svg:y="10.847cm" svg:viewBox="0 0 18488 568" draw:points="0,0 18488,0 18488,568 0,568">
          <text:p/>
        </draw:polygon>
        <draw:frame draw:style-name="gr3" draw:text-style-name="P4" draw:layer="layout" svg:width="17.308cm" svg:height="0.547cm" svg:x="2.249cm" svg:y="10.288cm">
          <draw:text-box>
            <text:p text:style-name="P1"><text:span text:style-name="T12">Ответ: </text:span><text:span text:style-name="T9">Обычно </text:span><text:span text:style-name="T12">1000</text:span><text:span text:style-name="T9">, так как диапазон для обычных пользователей начинается с </text:span></text:p>
          </draw:text-box>
        </draw:frame>
        <draw:polygon draw:style-name="gr5" draw:text-style-name="P6" draw:layer="layout" svg:width="18.487cm" svg:height="0.572cm" svg:x="1.562cm" svg:y="11.414cm" svg:viewBox="0 0 18488 573" draw:points="0,0 18488,0 18488,573 0,573">
          <text:p/>
        </draw:polygon>
        <draw:frame draw:style-name="gr3" draw:text-style-name="P4" draw:layer="layout" svg:width="14.203cm" svg:height="0.547cm" svg:x="2.249cm" svg:y="10.855cm">
          <draw:text-box>
            <text:p text:style-name="P1"><text:span text:style-name="T9">1000. В Astra Linux первый пользователь (sa) уже имеет UID 1000. </text:span></text:p>
          </draw:text-box>
        </draw:frame>
        <draw:frame draw:style-name="gr3" draw:text-style-name="P4" draw:layer="layout" svg:width="0.494cm" svg:height="0.547cm" svg:x="1.613cm" svg:y="11.431cm">
          <draw:text-box>
            <text:p text:style-name="P1"><text:span text:style-name="T9">7.</text:span></text:p>
          </draw:text-box>
        </draw:frame>
        <draw:frame draw:style-name="gr3" draw:text-style-name="P4" draw:layer="layout" svg:width="0.494cm" svg:height="0.556cm" svg:x="1.985cm" svg:y="11.424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11.986cm" svg:viewBox="0 0 18488 568" draw:points="0,0 18488,0 18488,568 0,568">
          <text:p/>
        </draw:polygon>
        <draw:frame draw:style-name="gr3" draw:text-style-name="P4" draw:layer="layout" svg:width="14.732cm" svg:height="0.547cm" svg:x="2.249cm" svg:y="11.431cm">
          <draw:text-box>
            <text:p text:style-name="P1"><text:span text:style-name="T12">Какие две команды могут быть использованы для блокировки и </text:span></text:p>
          </draw:text-box>
        </draw:frame>
        <draw:polygon draw:style-name="gr5" draw:text-style-name="P6" draw:layer="layout" svg:width="18.487cm" svg:height="0.567cm" svg:x="1.562cm" svg:y="12.553cm" svg:viewBox="0 0 18488 568" draw:points="0,0 18488,0 18488,568 0,568">
          <text:p/>
        </draw:polygon>
        <draw:polygon draw:style-name="gr9" draw:text-style-name="P10" draw:layer="layout" svg:width="1.879cm" svg:height="0.592cm" svg:x="3.895cm" svg:y="12.528cm" svg:viewBox="0 0 1880 593" draw:points="0,0 1880,0 1880,593 0,593">
          <text:p/>
        </draw:polygon>
        <draw:polygon draw:style-name="gr9" draw:text-style-name="P10" draw:layer="layout" svg:width="1.99cm" svg:height="0.592cm" svg:x="9.175cm" svg:y="12.528cm" svg:viewBox="0 0 1991 593" draw:points="0,0 1991,0 1991,593 0,593">
          <text:p/>
        </draw:polygon>
        <draw:polygon draw:style-name="gr9" draw:text-style-name="P10" draw:layer="layout" svg:width="1.99cm" svg:height="0.592cm" svg:x="16.331cm" svg:y="12.528cm" svg:viewBox="0 0 1991 593" draw:points="0,0 1991,0 1991,593 0,593">
          <text:p/>
        </draw:polygon>
        <draw:frame draw:style-name="gr3" draw:text-style-name="P4" draw:layer="layout" svg:width="6.968cm" svg:height="0.547cm" svg:x="2.249cm" svg:y="12.002cm">
          <draw:text-box>
            <text:p text:style-name="P1"><text:span text:style-name="T12">разблокировки пользователя? </text:span></text:p>
          </draw:text-box>
        </draw:frame>
        <draw:polygon draw:style-name="gr5" draw:text-style-name="P6" draw:layer="layout" svg:width="18.487cm" svg:height="0.568cm" svg:x="1.562cm" svg:y="13.12cm" svg:viewBox="0 0 18488 569" draw:points="0,0 18488,0 18488,569 0,569">
          <text:p/>
        </draw:polygon>
        <draw:polygon draw:style-name="gr9" draw:text-style-name="P10" draw:layer="layout" svg:width="0.301cm" svg:height="0.58cm" svg:x="2.248cm" svg:y="13.108cm" svg:viewBox="0 0 302 581" draw:points="0,0 302,0 302,581 0,581">
          <text:p/>
        </draw:polygon>
        <draw:polygon draw:style-name="gr9" draw:text-style-name="P10" draw:layer="layout" svg:width="2.345cm" svg:height="0.58cm" svg:x="3.061cm" svg:y="13.108cm" svg:viewBox="0 0 2346 581" draw:points="0,0 2346,0 2346,581 0,581">
          <text:p/>
        </draw:polygon>
        <draw:frame draw:style-name="gr3" draw:text-style-name="P4" draw:layer="layout" svg:width="16.116cm" svg:height="0.547cm" svg:x="2.249cm" svg:y="12.561cm">
          <draw:text-box>
            <text:p text:style-name="P1"><text:span text:style-name="T12">Ответ: </text:span><text:span text:style-name="T9">passwd -l (блокировка) и passwd -u (разблокировка); также usermod -</text:span></text:p>
          </draw:text-box>
        </draw:frame>
        <draw:polygon draw:style-name="gr5" draw:text-style-name="P6" draw:layer="layout" svg:width="18.487cm" svg:height="0.567cm" svg:x="1.562cm" svg:y="13.688cm" svg:viewBox="0 0 18488 568" draw:points="0,0 18488,0 18488,568 0,568">
          <text:p/>
        </draw:polygon>
        <draw:frame draw:style-name="gr3" draw:text-style-name="P4" draw:layer="layout" svg:width="3.417cm" svg:height="0.547cm" svg:x="2.249cm" svg:y="13.128cm">
          <draw:text-box>
            <text:p text:style-name="P1"><text:span text:style-name="T9">L и usermod -U <text:s/></text:span></text:p>
          </draw:text-box>
        </draw:frame>
        <draw:frame draw:style-name="gr3" draw:text-style-name="P4" draw:layer="layout" svg:width="0.494cm" svg:height="0.547cm" svg:x="1.613cm" svg:y="13.704cm">
          <draw:text-box>
            <text:p text:style-name="P1"><text:span text:style-name="T9">8.</text:span></text:p>
          </draw:text-box>
        </draw:frame>
        <draw:frame draw:style-name="gr3" draw:text-style-name="P4" draw:layer="layout" svg:width="0.494cm" svg:height="0.556cm" svg:x="1.985cm" svg:y="13.697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14.255cm" svg:viewBox="0 0 18488 568" draw:points="0,0 18488,0 18488,568 0,568">
          <text:p/>
        </draw:polygon>
        <draw:frame draw:style-name="gr3" draw:text-style-name="P4" draw:layer="layout" svg:width="17.576cm" svg:height="0.547cm" svg:x="2.249cm" svg:y="13.704cm">
          <draw:text-box>
            <text:p text:style-name="P1"><text:span text:style-name="T12">Как заставить пользователя iivanov принудительно сменить свой пароль при </text:span></text:p>
          </draw:text-box>
        </draw:frame>
        <draw:polygon draw:style-name="gr5" draw:text-style-name="P6" draw:layer="layout" svg:width="18.487cm" svg:height="0.572cm" svg:x="1.562cm" svg:y="14.822cm" svg:viewBox="0 0 18488 573" draw:points="0,0 18488,0 18488,573 0,573">
          <text:p/>
        </draw:polygon>
        <draw:polygon draw:style-name="gr9" draw:text-style-name="P10" draw:layer="layout" svg:width="4.726cm" svg:height="0.592cm" svg:x="6.405cm" svg:y="14.797cm" svg:viewBox="0 0 4727 593" draw:points="0,0 4727,0 4727,593 0,593">
          <text:p/>
        </draw:polygon>
        <draw:frame draw:style-name="gr3" draw:text-style-name="P4" draw:layer="layout" svg:width="4.3cm" svg:height="0.547cm" svg:x="2.249cm" svg:y="14.271cm">
          <draw:text-box>
            <text:p text:style-name="P1"><text:span text:style-name="T12">следующем входе? </text:span></text:p>
          </draw:text-box>
        </draw:frame>
        <draw:polygon draw:style-name="gr5" draw:text-style-name="P6" draw:layer="layout" svg:width="18.487cm" svg:height="0.568cm" svg:x="1.562cm" svg:y="15.394cm" svg:viewBox="0 0 18488 569" draw:points="0,0 18488,0 18488,569 0,569">
          <text:p/>
        </draw:polygon>
        <draw:frame draw:style-name="gr3" draw:text-style-name="P4" draw:layer="layout" svg:width="16.783cm" svg:height="0.547cm" svg:x="2.249cm" svg:y="14.83cm">
          <draw:text-box>
            <text:p text:style-name="P1"><text:span text:style-name="T12">Ответ: </text:span><text:span text:style-name="T9">Выполнить sudo chage -d 0 iivanov. Это устанавливает дату последнего </text:span></text:p>
          </draw:text-box>
        </draw:frame>
        <draw:polygon draw:style-name="gr5" draw:text-style-name="P6" draw:layer="layout" svg:width="18.487cm" svg:height="0.567cm" svg:x="1.562cm" svg:y="15.962cm" svg:viewBox="0 0 18488 568" draw:points="0,0 18488,0 18488,568 0,568">
          <text:p/>
        </draw:polygon>
        <draw:frame draw:style-name="gr3" draw:text-style-name="P4" draw:layer="layout" svg:width="15.872cm" svg:height="0.547cm" svg:x="2.249cm" svg:y="15.402cm">
          <draw:text-box>
            <text:p text:style-name="P1"><text:span text:style-name="T9">изменения пароля в 0, что заставляет систему требовать смену пароля при </text:span></text:p>
          </draw:text-box>
        </draw:frame>
        <draw:polygon draw:style-name="gr5" draw:text-style-name="P6" draw:layer="layout" svg:width="18.487cm" svg:height="0.567cm" svg:x="1.562cm" svg:y="16.529cm" svg:viewBox="0 0 18488 568" draw:points="0,0 18488,0 18488,568 0,568">
          <text:p/>
        </draw:polygon>
        <draw:frame draw:style-name="gr3" draw:text-style-name="P4" draw:layer="layout" svg:width="4.046cm" svg:height="0.547cm" svg:x="2.249cm" svg:y="15.97cm">
          <draw:text-box>
            <text:p text:style-name="P1"><text:span text:style-name="T9">следующем входе. </text:span></text:p>
          </draw:text-box>
        </draw:frame>
        <draw:frame draw:style-name="gr3" draw:text-style-name="P4" draw:layer="layout" svg:width="0.494cm" svg:height="0.547cm" svg:x="1.613cm" svg:y="16.545cm">
          <draw:text-box>
            <text:p text:style-name="P1"><text:span text:style-name="T9">9.</text:span></text:p>
          </draw:text-box>
        </draw:frame>
        <draw:frame draw:style-name="gr3" draw:text-style-name="P4" draw:layer="layout" svg:width="0.494cm" svg:height="0.556cm" svg:x="1.985cm" svg:y="16.538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7cm" svg:height="0.567cm" svg:x="1.562cm" svg:y="17.096cm" svg:viewBox="0 0 18488 568" draw:points="0,0 18488,0 18488,568 0,568">
          <text:p/>
        </draw:polygon>
        <draw:polygon draw:style-name="gr9" draw:text-style-name="P10" draw:layer="layout" svg:width="1.287cm" svg:height="0.592cm" svg:x="9.391cm" svg:y="17.071cm" svg:viewBox="0 0 1288 593" draw:points="0,0 1288,0 1288,593 0,593">
          <text:p/>
        </draw:polygon>
        <draw:frame draw:style-name="gr3" draw:text-style-name="P4" draw:layer="layout" svg:width="9.019cm" svg:height="0.547cm" svg:x="2.249cm" svg:y="16.545cm">
          <draw:text-box>
            <text:p text:style-name="P1"><text:span text:style-name="T12">Что делает команда faillog -u iivanov -r? </text:span></text:p>
          </draw:text-box>
        </draw:frame>
        <draw:polygon draw:style-name="gr5" draw:text-style-name="P6" draw:layer="layout" svg:width="18.487cm" svg:height="0.568cm" svg:x="1.562cm" svg:y="17.663cm" svg:viewBox="0 0 18488 569" draw:points="0,0 18488,0 18488,569 0,569">
          <text:p/>
        </draw:polygon>
        <draw:polygon draw:style-name="gr9" draw:text-style-name="P10" draw:layer="layout" svg:width="0.33cm" svg:height="0.58cm" svg:x="7.414cm" svg:y="17.651cm" svg:viewBox="0 0 331 581" draw:points="0,0 331,0 331,581 0,581">
          <text:p/>
        </draw:polygon>
        <draw:frame draw:style-name="gr3" draw:text-style-name="P4" draw:layer="layout" svg:width="15.951cm" svg:height="0.547cm" svg:x="2.249cm" svg:y="17.104cm">
          <draw:text-box>
            <text:p text:style-name="P1"><text:span text:style-name="T12">Ответ: </text:span><text:span text:style-name="T9">В общем контексте Linux faillog отображает сведения о неудачных </text:span></text:p>
          </draw:text-box>
        </draw:frame>
        <draw:polygon draw:style-name="gr5" draw:text-style-name="P6" draw:layer="layout" svg:width="18.487cm" svg:height="0.571cm" svg:x="1.562cm" svg:y="18.231cm" svg:viewBox="0 0 18488 572" draw:points="0,0 18488,0 18488,572 0,572">
          <text:p/>
        </draw:polygon>
        <draw:frame draw:style-name="gr3" draw:text-style-name="P4" draw:layer="layout" svg:width="15.097cm" svg:height="0.547cm" svg:x="2.249cm" svg:y="17.671cm">
          <draw:text-box>
            <text:p text:style-name="P1"><text:span text:style-name="T9">попытках входа, а ключ -r сбрасывает счётчики неудач для указанного </text:span></text:p>
          </draw:text-box>
        </draw:frame>
        <draw:polygon draw:style-name="gr5" draw:text-style-name="P6" draw:layer="layout" svg:width="18.487cm" svg:height="0.567cm" svg:x="1.562cm" svg:y="18.802cm" svg:viewBox="0 0 18488 568" draw:points="0,0 18488,0 18488,568 0,568">
          <text:p/>
        </draw:polygon>
        <draw:frame draw:style-name="gr3" draw:text-style-name="P4" draw:layer="layout" svg:width="15.068cm" svg:height="0.547cm" svg:x="2.249cm" svg:y="18.239cm">
          <draw:text-box>
            <text:p text:style-name="P1"><text:span text:style-name="T9">пользователя. Можно предположить, что она очищает журнал ошибок </text:span></text:p>
          </draw:text-box>
        </draw:frame>
        <draw:polygon draw:style-name="gr5" draw:text-style-name="P6" draw:layer="layout" svg:width="17.852cm" svg:height="0.563cm" svg:x="2.197cm" svg:y="19.865cm" svg:viewBox="0 0 17853 564" draw:points="0,0 17853,0 17853,564 0,564">
          <text:p/>
        </draw:polygon>
        <draw:frame draw:style-name="gr3" draw:text-style-name="P4" draw:layer="layout" svg:width="9.12cm" svg:height="0.547cm" svg:x="2.249cm" svg:y="18.81cm">
          <draw:text-box>
            <text:p text:style-name="P1"><text:span text:style-name="T9">аутентификации для пользователя iivanov. </text:span></text:p>
          </draw:text-box>
        </draw:frame>
        <draw:frame draw:style-name="gr3" draw:text-style-name="P4" draw:layer="layout" svg:width="0.494cm" svg:height="0.547cm" svg:x="2.249cm" svg:y="19.868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19T19:17:33.898920000</dc:date>
    <meta:editing-duration>PT1H5M14S</meta:editing-duration>
    <meta:editing-cycles>1</meta:editing-cycles>
    <meta:document-statistic meta:object-count="352"/>
    <meta:generator>LibreOffice/26.2.2.2$Windows_X86_64 LibreOffice_project/1f77d10d6938fd34972958f64b2bcfa54f8b1ba5</meta:generator>
  </office:meta>
</office:document-meta>
</file>