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A0000006830EBFBE7.png" manifest:media-type="image/png"/>
  <manifest:file-entry manifest:full-path="Pictures/1000000100000222000000792DED9C11.png" manifest:media-type="image/png"/>
  <manifest:file-entry manifest:full-path="Pictures/10000001000001F60000006A56319911.png" manifest:media-type="image/png"/>
  <manifest:file-entry manifest:full-path="Pictures/100000010000024200000155326C294A.png" manifest:media-type="image/png"/>
  <manifest:file-entry manifest:full-path="Pictures/1000000100000233000000941E4823BC.png" manifest:media-type="image/png"/>
  <manifest:file-entry manifest:full-path="Pictures/10000001000001270000002B77E1D3EE.png" manifest:media-type="image/png"/>
  <manifest:file-entry manifest:full-path="Pictures/10000001000002FC000000DC5F1E9114.png" manifest:media-type="image/png"/>
  <manifest:file-entry manifest:full-path="Pictures/10000001000002680000003E0372FFBD.png" manifest:media-type="image/png"/>
  <manifest:file-entry manifest:full-path="Pictures/10000001000001F200000066F2ED19B7.png" manifest:media-type="image/png"/>
  <manifest:file-entry manifest:full-path="Pictures/100000010000026D000000430B7C4F30.png" manifest:media-type="image/png"/>
  <manifest:file-entry manifest:full-path="Pictures/10000001000001AB0000008EBBF4D87F.png" manifest:media-type="image/png"/>
  <manifest:file-entry manifest:full-path="Pictures/1000000100000268000000B5D8731E33.png" manifest:media-type="image/png"/>
  <manifest:file-entry manifest:full-path="Pictures/10000001000001C30000003D7FCB1E90.png" manifest:media-type="image/png"/>
  <manifest:file-entry manifest:full-path="Pictures/1000000100000159000000501091DD66.png" manifest:media-type="image/png"/>
  <manifest:file-entry manifest:full-path="Pictures/10000001000002CE0000008EC7F04EE3.png" manifest:media-type="image/png"/>
  <manifest:file-entry manifest:full-path="Pictures/10000001000002F1000000EC50CB04A0.png" manifest:media-type="image/png"/>
  <manifest:file-entry manifest:full-path="Pictures/10000001000001690000003CC932707F.png" manifest:media-type="image/png"/>
  <manifest:file-entry manifest:full-path="Pictures/10000001000002540000007A814C46A2.png" manifest:media-type="image/png"/>
  <manifest:file-entry manifest:full-path="Pictures/100000010000025A000000420963555E.png" manifest:media-type="image/png"/>
  <manifest:file-entry manifest:full-path="Pictures/100000010000020F000000C7AE7BCA4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solid" draw:fill-color="#000000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none" draw:fill="solid" draw:fill-color="#ebeef2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ebeef2"/>
    </style:style>
    <style:style style:name="T1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" style:family="text">
      <style:text-properties fo:color="#00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style:style style:name="T3" style:family="text">
      <style:text-properties fo:color="#000000" loext:opacity="100%" style:font-name="Times New Roman" fo:font-size="11.1000003814697pt" fo:font-weight="bold" style:font-name-asian="Times New Roman" style:font-size-asian="11.1000003814697pt" style:font-weight-asian="bold" style:font-name-complex="Times New Roman" style:font-size-complex="11.1000003814697pt" style:font-weight-complex="bold"/>
    </style:style>
    <style:style style:name="T4" style:family="text">
      <style:text-properties fo:color="#000000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style:style style:name="T5" style:family="text">
      <style:text-properties fo:color="#000000" loext:opacity="100%" style:font-name="Times New Roman" fo:font-size="9.10000038146973pt" fo:font-weight="normal" style:font-name-asian="Times New Roman" style:font-size-asian="9.10000038146973pt" style:font-weight-asian="normal" style:font-name-complex="Times New Roman" style:font-size-complex="9.10000038146973pt" style:font-weight-complex="normal"/>
    </style:style>
    <style:style style:name="T6" style:family="text">
      <style:text-properties fo:color="#000000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7" style:family="text">
      <style:text-properties fo:color="#000000" loext:opacity="100%" style:font-name="Arial" fo:font-size="13.8999996185303pt" fo:font-weight="normal" style:font-name-asian="Arial" style:font-size-asian="13.8999996185303pt" style:font-weight-asian="normal" style:font-name-complex="Arial" style:font-size-complex="13.8999996185303pt" style:font-weight-complex="normal"/>
    </style:style>
    <style:style style:name="T8" style:family="text">
      <style:text-properties fo:color="#0f1115" loext:opacity="100%" style:font-name="Segoe UI" fo:font-size="10.1000003814697pt" fo:font-style="italic" fo:font-weight="normal" style:font-name-asian="Segoe UI" style:font-size-asian="10.1000003814697pt" style:font-style-asian="italic" style:font-weight-asian="normal" style:font-name-complex="Segoe UI" style:font-size-complex="10.1000003814697pt" style:font-style-complex="italic" style:font-weight-complex="normal"/>
    </style:style>
    <style:style style:name="T9" style:family="text">
      <style:text-properties fo:color="#0f1115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10" style:family="text">
      <style:text-properties fo:color="#0f1115" loext:opacity="100%" style:font-name="Arial" fo:font-size="13.8999996185303pt" fo:font-weight="normal" style:font-name-asian="Arial" style:font-size-asian="13.8999996185303pt" style:font-weight-asian="normal" style:font-name-complex="Arial" style:font-size-complex="13.8999996185303pt" style:font-weight-complex="normal"/>
    </style:style>
    <style:style style:name="T11" style:family="text">
      <style:text-properties fo:color="#0f1115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color="#0f1115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651cm" svg:height="0.471cm" svg:x="2.803cm" svg:y="1.842cm">
          <draw:text-box>
            <text:p text:style-name="P1"><text:span text:style-name="T1">МИНИСТЕРСТВО НАУКИ И ВЫСШЕГО ОБРАЗОВАНИЯ РОССИЙСКОЙ ФЕДЕРАЦИИ</text:span></text:p>
          </draw:text-box>
        </draw:frame>
        <draw:frame draw:style-name="gr2" draw:text-style-name="P3" draw:layer="layout" svg:width="0.388cm" svg:height="0.433cm" svg:x="19.456cm" svg:y="1.8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3.096cm" svg:height="0.471cm" svg:x="4.633cm" svg:y="2.324cm">
          <draw:text-box>
            <text:p text:style-name="P1"><text:span text:style-name="T1">Федеральное государственное бюджетное образовательное учреждение </text:span></text:p>
          </draw:text-box>
        </draw:frame>
        <draw:frame draw:style-name="gr1" draw:text-style-name="P2" draw:layer="layout" svg:width="4.026cm" svg:height="0.471cm" svg:x="9.164cm" svg:y="2.815cm">
          <draw:text-box>
            <text:p text:style-name="P1"><text:span text:style-name="T1">высшего образования </text:span></text:p>
          </draw:text-box>
        </draw:frame>
        <draw:frame draw:style-name="gr2" draw:text-style-name="P3" draw:layer="layout" svg:width="10.532cm" svg:height="0.433cm" svg:x="5.929cm" svg:y="3.311cm">
          <draw:text-box>
            <text:p text:style-name="P1"><text:span text:style-name="T3">«КУБАНСКИЙ ГОСУДАРСТВЕННЫЙ УНИВЕРСИТЕТ» </text:span></text:p>
          </draw:text-box>
        </draw:frame>
        <draw:frame draw:style-name="gr2" draw:text-style-name="P3" draw:layer="layout" svg:width="4.14cm" svg:height="0.433cm" svg:x="9.114cm" svg:y="3.76cm">
          <draw:text-box>
            <text:p text:style-name="P1"><text:span text:style-name="T3">(ФГБОУ ВО «КубГУ») </text:span></text:p>
          </draw:text-box>
        </draw:frame>
        <draw:frame draw:style-name="gr3" draw:text-style-name="P4" draw:layer="layout" svg:width="14.833cm" svg:height="0.543cm" svg:x="3.668cm" svg:y="4.416cm">
          <draw:text-box>
            <text:p text:style-name="P1"><text:span text:style-name="T4">Факультет компьютерных технологий и прикладной математики </text:span></text:p>
          </draw:text-box>
        </draw:frame>
        <draw:frame draw:style-name="gr4" draw:text-style-name="P5" draw:layer="layout" svg:width="0.321cm" svg:height="0.357cm" svg:x="18.583cm" svg:y="4.56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8.85cm" svg:height="0.543cm" svg:x="6.674cm" svg:y="5.195cm">
          <draw:text-box>
            <text:p text:style-name="P1"><text:span text:style-name="T4">Кафедра информационных технологий </text:span></text:p>
          </draw:text-box>
        </draw:frame>
        <draw:frame draw:style-name="gr4" draw:text-style-name="P5" draw:layer="layout" svg:width="0.321cm" svg:height="0.357cm" svg:x="15.576cm" svg:y="5.34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cm" svg:height="0.543cm" svg:x="11.062cm" svg:y="5.7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21cm" svg:height="0.357cm" svg:x="11.189cm" svg:y="5.9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6.32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6.41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6.80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6.89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7.29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7.3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7.77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7.86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8.2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8.3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8.75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8.84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9.24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9.33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0.22cm" svg:height="0.543cm" svg:x="6.048cm" svg:y="9.742cm">
          <draw:text-box>
            <text:p text:style-name="P1"><text:span text:style-name="T4">ОТЧЕТ ПО ЛАБОРАТОРНОЙ РАБОТЕ № 5 </text:span></text:p>
          </draw:text-box>
        </draw:frame>
        <draw:frame draw:style-name="gr3" draw:text-style-name="P4" draw:layer="layout" svg:width="3.433cm" svg:height="0.543cm" svg:x="9.461cm" svg:y="10.31cm">
          <draw:text-box>
            <text:p text:style-name="P1"><text:span text:style-name="T4">по дисциплине </text:span></text:p>
          </draw:text-box>
        </draw:frame>
        <draw:frame draw:style-name="gr3" draw:text-style-name="P4" draw:layer="layout" svg:width="6.015cm" svg:height="0.543cm" svg:x="8.106cm" svg:y="10.877cm">
          <draw:text-box>
            <text:p text:style-name="P1"><text:span text:style-name="T4"><text:s/>«Операционные системы»</text:span></text:p>
          </draw:text-box>
        </draw:frame>
        <draw:frame draw:style-name="gr4" draw:text-style-name="P5" draw:layer="layout" svg:width="0.321cm" svg:height="0.357cm" svg:x="14.153cm" svg:y="11.02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cm" svg:height="0.543cm" svg:x="11.129cm" svg:y="11.43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21cm" svg:height="0.357cm" svg:x="11.129cm" svg:y="12.00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cm" svg:height="0.543cm" svg:x="11.062cm" svg:y="12.3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21cm" svg:height="0.357cm" svg:x="11.189cm" svg:y="12.52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11.079cm" svg:y="12.93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11.18cm" svg:y="13.02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11.079cm" svg:y="13.41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11.18cm" svg:y="13.5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11.079cm" svg:y="13.91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6.149cm" svg:height="0.567cm" svg:x="9.418cm" svg:y="14.389cm" svg:viewBox="0 0 6150 568" draw:points="0,0 6150,0 6150,568 0,568">
          <text:p/>
        </draw:polygon>
        <draw:frame draw:style-name="gr4" draw:text-style-name="P5" draw:layer="layout" svg:width="0.321cm" svg:height="0.357cm" svg:x="11.18cm" svg:y="14.00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128cm" svg:height="0.543cm" svg:x="2.253cm" svg:y="14.4cm">
          <draw:text-box>
            <text:p text:style-name="P1"><text:span text:style-name="T6">Выполнил студент группы ПМ23 </text:span></text:p>
          </draw:text-box>
        </draw:frame>
        <draw:frame draw:style-name="gr1" draw:text-style-name="P2" draw:layer="layout" svg:width="6.14cm" svg:height="0.471cm" svg:x="9.418cm" svg:y="14.461cm">
          <draw:text-box>
            <text:p text:style-name="P1"><text:span text:style-name="T1"><text:s text:c="58"/></text:span></text:p>
          </draw:text-box>
        </draw:frame>
        <draw:frame draw:style-name="gr3" draw:text-style-name="P4" draw:layer="layout" svg:width="2.622cm" svg:height="0.543cm" svg:x="15.568cm" svg:y="14.4cm">
          <draw:text-box>
            <text:p text:style-name="P1"><text:span text:style-name="T6">E. E. Шопин</text:span></text:p>
          </draw:text-box>
        </draw:frame>
        <draw:polygon draw:style-name="gr6" draw:text-style-name="P7" draw:layer="layout" svg:width="5.827cm" svg:height="0.017cm" svg:x="9.418cm" svg:y="14.88cm" svg:viewBox="0 0 5828 18" draw:points="0,0 5828,0 5828,18 0,18">
          <text:p/>
        </draw:polygon>
        <draw:frame draw:style-name="gr4" draw:text-style-name="P5" draw:layer="layout" svg:width="0.321cm" svg:height="0.357cm" svg:x="18.625cm" svg:y="14.55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cm" svg:height="0.543cm" svg:x="2.253cm" svg:y="14.96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21cm" svg:height="0.357cm" svg:x="2.38cm" svg:y="15.11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721cm" svg:height="0.543cm" svg:x="2.253cm" svg:y="15.535cm">
          <draw:text-box>
            <text:p text:style-name="P1"><text:span text:style-name="T6">Направление подготовки 01.03.02 Прикладная математика и информатика </text:span></text:p>
          </draw:text-box>
        </draw:frame>
        <draw:polygon draw:style-name="gr6" draw:text-style-name="P7" draw:layer="layout" svg:width="10.275cm" svg:height="0.025cm" svg:x="7.664cm" svg:y="16.023cm" svg:viewBox="0 0 10276 26" draw:points="0,0 10276,0 10276,26 0,26">
          <text:p/>
        </draw:polygon>
        <draw:frame draw:style-name="gr4" draw:text-style-name="P5" draw:layer="layout" svg:width="0.321cm" svg:height="0.357cm" svg:x="18.066cm" svg:y="15.68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217cm" svg:height="0.543cm" svg:x="2.253cm" svg:y="16.103cm">
          <draw:text-box>
            <text:p text:style-name="P1"><text:span text:style-name="T6">Курс <text:s text:c="3"/>2   <text:s/></text:span></text:p>
          </draw:text-box>
        </draw:frame>
        <draw:polygon draw:style-name="gr6" draw:text-style-name="P7" draw:layer="layout" svg:width="0.382cm" svg:height="0.025cm" svg:x="3.413cm" svg:y="16.591cm" svg:viewBox="0 0 383 26" draw:points="0,0 383,0 383,26 0,26">
          <text:p/>
        </draw:polygon>
        <draw:polygon draw:style-name="gr6" draw:text-style-name="P7" draw:layer="layout" svg:width="0.246cm" svg:height="0.025cm" svg:x="3.794cm" svg:y="16.591cm" svg:viewBox="0 0 247 26" draw:points="0,0 247,0 247,26 0,26">
          <text:p/>
        </draw:polygon>
        <draw:polygon draw:style-name="gr6" draw:text-style-name="P7" draw:layer="layout" svg:width="0.322cm" svg:height="0.025cm" svg:x="4.04cm" svg:y="16.591cm" svg:viewBox="0 0 323 26" draw:points="0,0 323,0 323,26 0,26">
          <text:p/>
        </draw:polygon>
        <draw:frame draw:style-name="gr4" draw:text-style-name="P5" draw:layer="layout" svg:width="0.321cm" svg:height="0.357cm" svg:x="4.481cm" svg:y="16.25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cm" svg:height="0.543cm" svg:x="2.253cm" svg:y="16.67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21cm" svg:height="0.357cm" svg:x="2.38cm" svg:y="16.82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cm" svg:height="0.543cm" svg:x="2.253cm" svg:y="17.24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21cm" svg:height="0.357cm" svg:x="2.38cm" svg:y="17.397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5.836cm" svg:height="0.567cm" svg:x="9.274cm" svg:y="18.369cm" svg:viewBox="0 0 5837 568" draw:points="0,0 5837,0 5837,568 0,568">
          <text:p/>
        </draw:polygon>
        <draw:frame draw:style-name="gr3" draw:text-style-name="P4" draw:layer="layout" svg:width="1.844cm" svg:height="0.543cm" svg:x="2.253cm" svg:y="17.813cm">
          <draw:text-box>
            <text:p text:style-name="P1"><text:span text:style-name="T6">Принял, </text:span></text:p>
          </draw:text-box>
        </draw:frame>
        <draw:frame draw:style-name="gr3" draw:text-style-name="P4" draw:layer="layout" svg:width="6.987cm" svg:height="0.543cm" svg:x="2.253cm" svg:y="18.38cm">
          <draw:text-box>
            <text:p text:style-name="P1"><text:span text:style-name="T6">канд. техн. наук, доцент каф. ИТ </text:span></text:p>
          </draw:text-box>
        </draw:frame>
        <draw:frame draw:style-name="gr1" draw:text-style-name="P2" draw:layer="layout" svg:width="5.823cm" svg:height="0.471cm" svg:x="9.275cm" svg:y="18.441cm">
          <draw:text-box>
            <text:p text:style-name="P1"><text:span text:style-name="T1"><text:s text:c="55"/></text:span></text:p>
          </draw:text-box>
        </draw:frame>
        <draw:frame draw:style-name="gr3" draw:text-style-name="P4" draw:layer="layout" svg:width="3.514cm" svg:height="0.543cm" svg:x="15.111cm" svg:y="18.38cm">
          <draw:text-box>
            <text:p text:style-name="P1"><text:span text:style-name="T6">А.А. Полупанов </text:span></text:p>
          </draw:text-box>
        </draw:frame>
        <draw:polygon draw:style-name="gr6" draw:text-style-name="P7" draw:layer="layout" svg:width="5.514cm" svg:height="0.017cm" svg:x="9.274cm" svg:y="18.86cm" svg:viewBox="0 0 5515 18" draw:points="0,0 5515,0 5515,18 0,18">
          <text:p/>
        </draw:polygon>
        <draw:frame draw:style-name="gr4" draw:text-style-name="P5" draw:layer="layout" svg:width="0.321cm" svg:height="0.357cm" svg:x="18.633cm" svg:y="18.53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18.94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19.03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19.42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19.51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19.91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20.00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20.3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20.4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20.88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20.97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21.37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21.4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21.8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21.95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22.34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22.43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22.83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22.92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23.319cm">
          <draw:text-box>
            <text:p text:style-name="P1"><text:span text:style-name="T1"><text:s text:c="2"/></text:span></text:p>
          </draw:text-box>
        </draw:frame>
        <draw:frame draw:style-name="gr4" draw:text-style-name="P5" draw:layer="layout" svg:width="0.321cm" svg:height="0.357cm" svg:x="2.253cm" svg:y="23.80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253cm" svg:y="24.17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21cm" svg:height="0.357cm" svg:x="2.355cm" svg:y="24.26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478cm" svg:height="0.543cm" svg:x="9.884cm" svg:y="24.664cm">
          <draw:text-box>
            <text:p text:style-name="P1"><text:span text:style-name="T6">Краснодар <text:s/></text:span></text:p>
          </draw:text-box>
        </draw:frame>
        <draw:frame draw:style-name="gr4" draw:text-style-name="P5" draw:layer="layout" svg:width="0.321cm" svg:height="0.357cm" svg:x="12.375cm" svg:y="24.81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07cm" svg:height="0.543cm" svg:x="10.63cm" svg:y="25.241cm">
          <draw:text-box>
            <text:p text:style-name="P1"><text:span text:style-name="T6">2026 </text:span></text:p>
          </draw:text-box>
        </draw:frame>
        <draw:frame draw:style-name="gr2" draw:text-style-name="P3" draw:layer="layout" svg:width="0.388cm" svg:height="0.433cm" svg:x="2.253cm" svg:y="25.80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cm" svg:height="0.543cm" svg:x="2.253cm" svg:y="26.58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cm" svg:height="0.543cm" svg:x="3.252cm" svg:y="27.468cm">
          <draw:text-box>
            <text:p text:style-name="P1"><text:span text:style-name="T6"><text:s/></text:span></text:p>
          </draw:text-box>
        </draw:frame>
      </draw:page>
      <draw:page draw:name="page2" draw:style-name="dp1" draw:master-page-name="master-page36">
        <draw:frame draw:style-name="gr3" draw:text-style-name="P4" draw:layer="layout" svg:width="2.398cm" svg:height="0.543cm" svg:x="3.252cm" svg:y="1.858cm">
          <draw:text-box>
            <text:p text:style-name="P1"><text:span text:style-name="T4">Задание 1. </text:span></text:p>
          </draw:text-box>
        </draw:frame>
        <draw:frame draw:style-name="gr3" draw:text-style-name="P4" draw:layer="layout" svg:width="0.49cm" svg:height="0.543cm" svg:x="1.254cm" svg:y="2.416cm">
          <draw:text-box>
            <text:p text:style-name="P1"><text:span text:style-name="T6">1.</text:span></text:p>
          </draw:text-box>
        </draw:frame>
        <draw:frame draw:style-name="gr3" draw:text-style-name="P4" draw:layer="layout" svg:width="0.49cm" svg:height="0.552cm" svg:x="1.626cm" svg:y="2.41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355cm" svg:height="0.475cm" svg:x="2.253cm" svg:y="2.4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88cm" svg:height="0.543cm" svg:x="2.355cm" svg:y="2.416cm">
          <draw:text-box>
            <text:p text:style-name="P1"><text:span text:style-name="T6">Создайте пользователя user1, назначьте пароль и выполните вход </text:span></text:p>
          </draw:text-box>
        </draw:frame>
        <draw:frame draw:style-name="gr3" draw:text-style-name="P4" draw:layer="layout" svg:width="0.49cm" svg:height="0.543cm" svg:x="18.193cm" svg:y="8.844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7.602cm" svg:height="0.543cm" svg:x="6.742cm" svg:y="9.581cm">
          <draw:text-box>
            <text:p text:style-name="P1"><text:span text:style-name="T6">Рисунок 1 – Создание пользователя </text:span></text:p>
          </draw:text-box>
        </draw:frame>
        <draw:frame draw:style-name="gr3" draw:text-style-name="P4" draw:layer="layout" svg:width="0.49cm" svg:height="0.543cm" svg:x="19.083cm" svg:y="14.28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5.806cm" svg:height="0.543cm" svg:x="7.648cm" svg:y="15.018cm">
          <draw:text-box>
            <text:p text:style-name="P1"><text:span text:style-name="T6">Рисунок 2 – Процесс входа </text:span></text:p>
          </draw:text-box>
        </draw:frame>
        <draw:frame draw:style-name="gr3" draw:text-style-name="P4" draw:layer="layout" svg:width="0.49cm" svg:height="0.543cm" svg:x="10.503cm" svg:y="15.86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cm" svg:height="0.543cm" svg:x="1.254cm" svg:y="16.721cm">
          <draw:text-box>
            <text:p text:style-name="P1"><text:span text:style-name="T6">2.</text:span></text:p>
          </draw:text-box>
        </draw:frame>
        <draw:frame draw:style-name="gr3" draw:text-style-name="P4" draw:layer="layout" svg:width="0.49cm" svg:height="0.552cm" svg:x="1.626cm" svg:y="16.714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355cm" svg:height="0.475cm" svg:x="2.253cm" svg:y="16.77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7.197cm" svg:height="0.543cm" svg:x="2.355cm" svg:y="16.721cm">
          <draw:text-box>
            <text:p text:style-name="P1"><text:span text:style-name="T6">Создайте <text:s/>файл <text:s/>в домашней <text:s/>директории <text:s/>с <text:s/>содержимым <text:s/>«hello» <text:s/>и <text:s/>правами <text:s/>по </text:span></text:p>
          </draw:text-box>
        </draw:frame>
        <draw:frame draw:style-name="gr3" draw:text-style-name="P4" draw:layer="layout" svg:width="2.529cm" svg:height="0.543cm" svg:x="1.254cm" svg:y="17.568cm">
          <draw:text-box>
            <text:p text:style-name="P1"><text:span text:style-name="T6">умолчанию </text:span></text:p>
          </draw:text-box>
        </draw:frame>
        <draw:polygon draw:style-name="gr5" draw:text-style-name="P6" draw:layer="layout" svg:width="2.355cm" svg:height="0.584cm" svg:x="11.256cm" svg:y="20.309cm" svg:viewBox="0 0 2356 585" draw:points="0,0 2356,0 2356,585 0,585">
          <text:p/>
        </draw:polygon>
        <draw:frame draw:style-name="gr3" draw:text-style-name="P4" draw:layer="layout" svg:width="0.49cm" svg:height="0.543cm" svg:x="15.796cm" svg:y="19.601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5.071cm" svg:height="0.543cm" svg:x="8.64cm" svg:y="20.337cm">
          <draw:text-box>
            <text:p text:style-name="P1"><text:span text:style-name="T6">Рисунок 3 – </text:span><text:span text:style-name="T9">Вывод ls –l </text:span></text:p>
          </draw:text-box>
        </draw:frame>
        <draw:frame draw:style-name="gr3" draw:text-style-name="P4" draw:layer="layout" svg:width="0.49cm" svg:height="0.543cm" svg:x="11.129cm" svg:y="21.19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cm" svg:height="0.543cm" svg:x="1.254cm" svg:y="22.04cm">
          <draw:text-box>
            <text:p text:style-name="P1"><text:span text:style-name="T6">3.</text:span></text:p>
          </draw:text-box>
        </draw:frame>
        <draw:frame draw:style-name="gr3" draw:text-style-name="P4" draw:layer="layout" svg:width="0.49cm" svg:height="0.552cm" svg:x="1.626cm" svg:y="22.033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2.934cm" svg:height="0.543cm" svg:x="2.253cm" svg:y="22.04cm">
          <draw:text-box>
            <text:p text:style-name="P1"><text:span text:style-name="T6">Назначьте права 000 и проверьте отсутствие чтения и записи </text:span></text:p>
          </draw:text-box>
        </draw:frame>
        <draw:frame draw:style-name="gr3" draw:text-style-name="P4" draw:layer="layout" svg:width="0.49cm" svg:height="0.543cm" svg:x="17.194cm" svg:y="25.64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1.293cm" svg:height="0.543cm" svg:x="5.014cm" svg:y="26.384cm">
          <draw:text-box>
            <text:p text:style-name="P1"><text:span text:style-name="T6">Рисунок 4 – <text:s/>Обе попытки с сообщениями об ошибке </text:span></text:p>
          </draw:text-box>
        </draw:frame>
        <draw:frame draw:style-name="gr3" draw:text-style-name="P4" draw:layer="layout" svg:width="0.49cm" svg:height="0.543cm" svg:x="11.129cm" svg:y="27.231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4.048cm" svg:height="5.046cm" svg:x="4.111cm" svg:y="3.254cm">
          <draw:image xlink:href="Pictures/1000000100000222000000792DED9C11.png" xlink:type="simple" xlink:show="embed" xlink:actuate="onLoad" draw:mime-type="image/png">
            <text:p/>
          </draw:image>
        </draw:frame>
        <draw:frame draw:style-name="gr8" draw:text-style-name="P9" draw:layer="layout" svg:width="17.104cm" svg:height="4.292cm" svg:x="1.973cm" svg:y="10.422cm">
          <draw:image xlink:href="Pictures/10000001000001270000002B77E1D3EE.png" xlink:type="simple" xlink:show="embed" xlink:actuate="onLoad" draw:mime-type="image/png">
            <text:p/>
          </draw:image>
        </draw:frame>
        <draw:frame draw:style-name="gr8" draw:text-style-name="P9" draw:layer="layout" svg:width="11.288cm" svg:height="1.627cm" svg:x="4.498cm" svg:y="18.407cm">
          <draw:image xlink:href="Pictures/10000001000002680000003E0372FFBD.png" xlink:type="simple" xlink:show="embed" xlink:actuate="onLoad" draw:mime-type="image/png">
            <text:p/>
          </draw:image>
        </draw:frame>
        <draw:frame draw:style-name="gr8" draw:text-style-name="P9" draw:layer="layout" svg:width="13.08cm" svg:height="3.204cm" svg:x="4.107cm" svg:y="22.875cm">
          <draw:image xlink:href="Pictures/10000001000001F200000066F2ED19B7.png" xlink:type="simple" xlink:show="embed" xlink:actuate="onLoad" draw:mime-type="image/png">
            <text:p/>
          </draw:image>
        </draw:frame>
        <draw:frame draw:style-name="gr3" draw:text-style-name="P4" draw:layer="layout" svg:width="0.49cm" svg:height="0.543cm" svg:x="11.129cm" svg:y="28.087cm">
          <draw:text-box>
            <text:p text:style-name="P1"><text:span text:style-name="T6"><text:s/></text:span></text:p>
          </draw:text-box>
        </draw:frame>
      </draw:page>
      <draw:page draw:name="page3" draw:style-name="dp1" draw:master-page-name="master-page36">
        <draw:frame draw:style-name="gr3" draw:text-style-name="P4" draw:layer="layout" svg:width="0.49cm" svg:height="0.543cm" svg:x="11.129cm" svg:y="1.849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cm" svg:height="0.543cm" svg:x="11.129cm" svg:y="2.69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cm" svg:height="0.543cm" svg:x="1.254cm" svg:y="3.551cm">
          <draw:text-box>
            <text:p text:style-name="P1"><text:span text:style-name="T6">4.</text:span></text:p>
          </draw:text-box>
        </draw:frame>
        <draw:frame draw:style-name="gr3" draw:text-style-name="P4" draw:layer="layout" svg:width="0.49cm" svg:height="0.552cm" svg:x="1.626cm" svg:y="3.544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4.224cm" svg:height="0.543cm" svg:x="2.253cm" svg:y="3.551cm">
          <draw:text-box>
            <text:p text:style-name="P1"><text:span text:style-name="T6">Назначьте права 400 и проверьте чтение, но невозможность записи </text:span></text:p>
          </draw:text-box>
        </draw:frame>
        <draw:frame draw:style-name="gr3" draw:text-style-name="P4" draw:layer="layout" svg:width="0.49cm" svg:height="0.543cm" svg:x="17.719cm" svg:y="8.921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0.192cm" svg:height="0.543cm" svg:x="5.565cm" svg:y="9.657cm">
          <draw:text-box>
            <text:p text:style-name="P1"><text:span text:style-name="T6">Рисунок 5 – <text:s/>Успешное чтение и ошибка записи </text:span></text:p>
          </draw:text-box>
        </draw:frame>
        <draw:frame draw:style-name="gr3" draw:text-style-name="P4" draw:layer="layout" svg:width="0.49cm" svg:height="0.543cm" svg:x="10.63cm" svg:y="10.51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cm" svg:height="0.543cm" svg:x="1.254cm" svg:y="11.36cm">
          <draw:text-box>
            <text:p text:style-name="P1"><text:span text:style-name="T6">5.</text:span></text:p>
          </draw:text-box>
        </draw:frame>
        <draw:frame draw:style-name="gr3" draw:text-style-name="P4" draw:layer="layout" svg:width="0.49cm" svg:height="0.552cm" svg:x="1.626cm" svg:y="11.353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0.482cm" svg:height="0.543cm" svg:x="2.253cm" svg:y="11.36cm">
          <draw:text-box>
            <text:p text:style-name="P1"><text:span text:style-name="T6">Назначьте права 600 и проверьте чтение и запись </text:span></text:p>
          </draw:text-box>
        </draw:frame>
        <draw:frame draw:style-name="gr3" draw:text-style-name="P4" draw:layer="layout" svg:width="0.49cm" svg:height="0.543cm" svg:x="17.719cm" svg:y="16.47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8.777cm" svg:height="0.543cm" svg:x="6.276cm" svg:y="17.212cm">
          <draw:text-box>
            <text:p text:style-name="P1"><text:span text:style-name="T6">Рисунок 6 – <text:s/>Вывод cat после добавления </text:span></text:p>
          </draw:text-box>
        </draw:frame>
        <draw:frame draw:style-name="gr3" draw:text-style-name="P4" draw:layer="layout" svg:width="0.49cm" svg:height="0.543cm" svg:x="10.63cm" svg:y="18.059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cm" svg:height="0.543cm" svg:x="1.83cm" svg:y="18.915cm">
          <draw:text-box>
            <text:p text:style-name="P1"><text:span text:style-name="T6">6.</text:span></text:p>
          </draw:text-box>
        </draw:frame>
        <draw:frame draw:style-name="gr3" draw:text-style-name="P4" draw:layer="layout" svg:width="0.49cm" svg:height="0.552cm" svg:x="2.202cm" svg:y="18.908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6.497cm" svg:height="0.543cm" svg:x="2.829cm" svg:y="18.915cm">
          <draw:text-box>
            <text:p text:style-name="P1"><text:span text:style-name="T6">Назначьте права 006 и проверьте, что user1 (владелец) не может читать/писать</text:span></text:p>
          </draw:text-box>
        </draw:frame>
        <draw:frame draw:style-name="gr3" draw:text-style-name="P4" draw:layer="layout" svg:width="0.49cm" svg:height="0.543cm" svg:x="17.219cm" svg:y="22.43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205cm" svg:height="0.543cm" svg:x="7.572cm" svg:y="23.174cm">
          <draw:text-box>
            <text:p text:style-name="P1"><text:span text:style-name="T6">Рисунок 7 – <text:s/>Отказ в доступе </text:span></text:p>
          </draw:text-box>
        </draw:frame>
        <draw:frame draw:style-name="gr8" draw:text-style-name="P9" draw:layer="layout" svg:width="13.111cm" svg:height="4.968cm" svg:x="4.588cm" svg:y="4.39cm">
          <draw:image xlink:href="Pictures/1000000100000233000000941E4823BC.png" xlink:type="simple" xlink:show="embed" xlink:actuate="onLoad" draw:mime-type="image/png">
            <text:p/>
          </draw:image>
        </draw:frame>
        <draw:frame draw:style-name="gr8" draw:text-style-name="P9" draw:layer="layout" svg:width="13.132cm" svg:height="4.709cm" svg:x="4.581cm" svg:y="12.199cm">
          <draw:image xlink:href="Pictures/10000001000001AB0000008EBBF4D87F.png" xlink:type="simple" xlink:show="embed" xlink:actuate="onLoad" draw:mime-type="image/png">
            <text:p/>
          </draw:image>
        </draw:frame>
        <draw:frame draw:style-name="gr8" draw:text-style-name="P9" draw:layer="layout" svg:width="13.132cm" svg:height="3.125cm" svg:x="4.081cm" svg:y="19.748cm">
          <draw:image xlink:href="Pictures/10000001000001F60000006A56319911.png" xlink:type="simple" xlink:show="embed" xlink:actuate="onLoad" draw:mime-type="image/png">
            <text:p/>
          </draw:image>
        </draw:frame>
        <draw:frame draw:style-name="gr3" draw:text-style-name="P4" draw:layer="layout" svg:width="0.49cm" svg:height="0.543cm" svg:x="11.129cm" svg:y="24.029cm">
          <draw:text-box>
            <text:p text:style-name="P1"><text:span text:style-name="T6"><text:s/></text:span></text:p>
          </draw:text-box>
        </draw:frame>
      </draw:page>
      <draw:page draw:name="page4" draw:style-name="dp1" draw:master-page-name="master-page47">
        <draw:frame draw:style-name="gr3" draw:text-style-name="P4" draw:layer="layout" svg:width="2.398cm" svg:height="0.543cm" svg:x="3.252cm" svg:y="1.858cm">
          <draw:text-box>
            <text:p text:style-name="P1"><text:span text:style-name="T4">Задание 2. </text:span></text:p>
          </draw:text-box>
        </draw:frame>
        <draw:frame draw:style-name="gr3" draw:text-style-name="P4" draw:layer="layout" svg:width="0.49cm" svg:height="0.543cm" svg:x="1.254cm" svg:y="3.009cm">
          <draw:text-box>
            <text:p text:style-name="P1"><text:span text:style-name="T9">1.</text:span></text:p>
          </draw:text-box>
        </draw:frame>
        <draw:frame draw:style-name="gr3" draw:text-style-name="P4" draw:layer="layout" svg:width="0.49cm" svg:height="0.552cm" svg:x="1.626cm" svg:y="3.002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0.997cm" svg:height="2.448cm" svg:x="0cm" svg:y="3.565cm" svg:viewBox="0 0 20998 2449" draw:points="0,0 20998,0 20998,2449 0,2449">
          <text:p/>
        </draw:polygon>
        <draw:frame draw:style-name="gr3" draw:text-style-name="P4" draw:layer="layout" svg:width="13.026cm" svg:height="0.543cm" svg:x="2.253cm" svg:y="3.009cm">
          <draw:text-box>
            <text:p text:style-name="P1"><text:span text:style-name="T9">Скопируйте исполняемый файл cat в домашнюю директорию </text:span></text:p>
          </draw:text-box>
        </draw:frame>
        <draw:frame draw:style-name="gr1" draw:text-style-name="P2" draw:layer="layout" svg:width="0.422cm" svg:height="0.471cm" svg:x="19.744cm" svg:y="5.636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8.184cm" svg:height="0.543cm" svg:x="6.454cm" svg:y="6.236cm">
          <draw:text-box>
            <text:p text:style-name="P1"><text:span text:style-name="T6">Рисунок 8 – Копирование и вывод ls -l </text:span></text:p>
          </draw:text-box>
        </draw:frame>
        <draw:frame draw:style-name="gr3" draw:text-style-name="P4" draw:layer="layout" svg:width="0.49cm" svg:height="0.543cm" svg:x="1.254cm" svg:y="7.693cm">
          <draw:text-box>
            <text:p text:style-name="P1"><text:span text:style-name="T9">2.</text:span></text:p>
          </draw:text-box>
        </draw:frame>
        <draw:frame draw:style-name="gr3" draw:text-style-name="P4" draw:layer="layout" svg:width="0.49cm" svg:height="0.552cm" svg:x="1.626cm" svg:y="7.686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0.997cm" svg:height="4.107cm" svg:x="0cm" svg:y="8.664cm" svg:viewBox="0 0 20998 4108" draw:points="0,0 20998,0 20998,4108 0,4108">
          <text:p/>
        </draw:polygon>
        <draw:frame draw:style-name="gr3" draw:text-style-name="P4" draw:layer="layout" svg:width="11.064cm" svg:height="0.543cm" svg:x="2.253cm" svg:y="7.693cm">
          <draw:text-box>
            <text:p text:style-name="P1"><text:span text:style-name="T9">Выполните чтение файла file.txt с помощью ~/mycat </text:span></text:p>
          </draw:text-box>
        </draw:frame>
        <draw:frame draw:style-name="gr3" draw:text-style-name="P4" draw:layer="layout" svg:width="0.49cm" svg:height="0.543cm" svg:x="17.177cm" svg:y="12.334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8.87cm" svg:height="0.736cm" svg:x="1.186cm" svg:y="14.262cm" svg:viewBox="0 0 18871 737" draw:points="0,0 18871,0 18871,737 0,737">
          <text:p/>
        </draw:polygon>
        <draw:frame draw:style-name="gr3" draw:text-style-name="P4" draw:layer="layout" svg:width="7.666cm" svg:height="0.543cm" svg:x="6.708cm" svg:y="12.995cm">
          <draw:text-box>
            <text:p text:style-name="P1"><text:span text:style-name="T6">Рисунок 9 – <text:s/>Успешное выполнение </text:span></text:p>
          </draw:text-box>
        </draw:frame>
        <draw:frame draw:style-name="gr3" draw:text-style-name="P4" draw:layer="layout" svg:width="0.49cm" svg:height="0.543cm" svg:x="1.237cm" svg:y="14.451cm">
          <draw:text-box>
            <text:p text:style-name="P1"><text:span text:style-name="T9">3.</text:span></text:p>
          </draw:text-box>
        </draw:frame>
        <draw:frame draw:style-name="gr3" draw:text-style-name="P4" draw:layer="layout" svg:width="0.49cm" svg:height="0.552cm" svg:x="1.61cm" svg:y="14.444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0.997cm" svg:height="2.084cm" svg:x="0cm" svg:y="15.421cm" svg:viewBox="0 0 20998 2085" draw:points="0,0 20998,0 20998,2085 0,2085">
          <text:p/>
        </draw:polygon>
        <draw:frame draw:style-name="gr3" draw:text-style-name="P4" draw:layer="layout" svg:width="14.027cm" svg:height="0.543cm" svg:x="2.253cm" svg:y="14.451cm">
          <draw:text-box>
            <text:p text:style-name="P1"><text:span text:style-name="T9">Назначьте права 600 на mycat и проверьте невозможность запуска </text:span></text:p>
          </draw:text-box>
        </draw:frame>
        <draw:frame draw:style-name="gr3" draw:text-style-name="P4" draw:layer="layout" svg:width="0.49cm" svg:height="0.543cm" svg:x="17.169cm" svg:y="17.06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8.87cm" svg:height="0.746cm" svg:x="1.186cm" svg:y="18.75cm" svg:viewBox="0 0 18871 747" draw:points="0,0 18871,0 18871,747 0,747">
          <text:p/>
        </draw:polygon>
        <draw:frame draw:style-name="gr3" draw:text-style-name="P4" draw:layer="layout" svg:width="4.678cm" svg:height="0.543cm" svg:x="8.462cm" svg:y="17.737cm">
          <draw:text-box>
            <text:p text:style-name="P1"><text:span text:style-name="T6">Рисунок 10 – Ошибка </text:span></text:p>
          </draw:text-box>
        </draw:frame>
        <draw:frame draw:style-name="gr3" draw:text-style-name="P4" draw:layer="layout" svg:width="0.49cm" svg:height="0.543cm" svg:x="1.237cm" svg:y="18.932cm">
          <draw:text-box>
            <text:p text:style-name="P1"><text:span text:style-name="T9">4.</text:span></text:p>
          </draw:text-box>
        </draw:frame>
        <draw:frame draw:style-name="gr3" draw:text-style-name="P4" draw:layer="layout" svg:width="0.49cm" svg:height="0.552cm" svg:x="1.61cm" svg:y="18.925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0.997cm" svg:height="2.668cm" svg:x="0cm" svg:y="19.919cm" svg:viewBox="0 0 20998 2669" draw:points="0,0 20998,0 20998,2669 0,2669">
          <text:p/>
        </draw:polygon>
        <draw:frame draw:style-name="gr3" draw:text-style-name="P4" draw:layer="layout" svg:width="12.746cm" svg:height="0.543cm" svg:x="2.253cm" svg:y="18.932cm">
          <draw:text-box>
            <text:p text:style-name="P1"><text:span text:style-name="T9">Назначьте права 100 и проверьте, что запуск снова работает </text:span></text:p>
          </draw:text-box>
        </draw:frame>
        <draw:frame draw:style-name="gr3" draw:text-style-name="P4" draw:layer="layout" svg:width="0.49cm" svg:height="0.543cm" svg:x="15.568cm" svg:y="22.158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6.756cm" svg:height="0.543cm" svg:x="7.292cm" svg:y="22.819cm">
          <draw:text-box>
            <text:p text:style-name="P1"><text:span text:style-name="T6">Рисунок 11 – Успешный запуск </text:span></text:p>
          </draw:text-box>
        </draw:frame>
        <draw:frame draw:style-name="gr8" draw:text-style-name="P9" draw:layer="layout" svg:width="18.379cm" svg:height="2.444cm" svg:x="1.32cm" svg:y="3.567cm">
          <draw:image xlink:href="Pictures/100000010000026D000000430B7C4F30.png" xlink:type="simple" xlink:show="embed" xlink:actuate="onLoad" draw:mime-type="image/png">
            <text:p/>
          </draw:image>
        </draw:frame>
        <draw:frame draw:style-name="gr8" draw:text-style-name="P9" draw:layer="layout" svg:width="13.292cm" svg:height="4.107cm" svg:x="3.881cm" svg:y="8.662cm">
          <draw:image xlink:href="Pictures/1000000100000268000000B5D8731E33.png" xlink:type="simple" xlink:show="embed" xlink:actuate="onLoad" draw:mime-type="image/png">
            <text:p/>
          </draw:image>
        </draw:frame>
        <draw:frame draw:style-name="gr8" draw:text-style-name="P9" draw:layer="layout" svg:width="13.27cm" svg:height="2.075cm" svg:x="3.886cm" svg:y="15.421cm">
          <draw:image xlink:href="Pictures/10000001000001C30000003D7FCB1E90.png" xlink:type="simple" xlink:show="embed" xlink:actuate="onLoad" draw:mime-type="image/png">
            <text:p/>
          </draw:image>
        </draw:frame>
        <draw:frame draw:style-name="gr8" draw:text-style-name="P9" draw:layer="layout" svg:width="10.066cm" svg:height="2.671cm" svg:x="5.494cm" svg:y="19.91cm">
          <draw:image xlink:href="Pictures/1000000100000159000000501091DD66.png" xlink:type="simple" xlink:show="embed" xlink:actuate="onLoad" draw:mime-type="image/png">
            <text:p/>
          </draw:image>
        </draw:frame>
        <draw:frame draw:style-name="gr3" draw:text-style-name="P4" draw:layer="layout" svg:width="0.49cm" svg:height="0.543cm" svg:x="10.63cm" svg:y="23.716cm">
          <draw:text-box>
            <text:p text:style-name="P1"><text:span text:style-name="T6"><text:s/></text:span></text:p>
          </draw:text-box>
        </draw:frame>
      </draw:page>
      <draw:page draw:name="page5" draw:style-name="dp1" draw:master-page-name="master-page47">
        <draw:frame draw:style-name="gr3" draw:text-style-name="P4" draw:layer="layout" svg:width="2.398cm" svg:height="0.543cm" svg:x="3.252cm" svg:y="1.858cm">
          <draw:text-box>
            <text:p text:style-name="P1"><text:span text:style-name="T4">Задание 3. </text:span></text:p>
          </draw:text-box>
        </draw:frame>
        <draw:frame draw:style-name="gr3" draw:text-style-name="P4" draw:layer="layout" svg:width="0.49cm" svg:height="0.543cm" svg:x="1.237cm" svg:y="3.009cm">
          <draw:text-box>
            <text:p text:style-name="P1"><text:span text:style-name="T9">1.</text:span></text:p>
          </draw:text-box>
        </draw:frame>
        <draw:frame draw:style-name="gr3" draw:text-style-name="P4" draw:layer="layout" svg:width="0.49cm" svg:height="0.552cm" svg:x="1.61cm" svg:y="3.002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0.997cm" svg:height="3.269cm" svg:x="0cm" svg:y="3.565cm" svg:viewBox="0 0 20998 3270" draw:points="0,0 20998,0 20998,3270 0,3270">
          <text:p/>
        </draw:polygon>
        <draw:frame draw:style-name="gr3" draw:text-style-name="P4" draw:layer="layout" svg:width="13.384cm" svg:height="0.543cm" svg:x="2.253cm" svg:y="3.009cm">
          <draw:text-box>
            <text:p text:style-name="P1"><text:span text:style-name="T9">Создайте каталог ~/folder и файл внутри с содержимым «hello» </text:span></text:p>
          </draw:text-box>
        </draw:frame>
        <draw:frame draw:style-name="gr1" draw:text-style-name="P2" draw:layer="layout" svg:width="0.422cm" svg:height="0.471cm" svg:x="18.549cm" svg:y="6.457cm">
          <draw:text-box>
            <text:p text:style-name="P1"><text:span text:style-name="T11"><text:s/></text:span></text:p>
          </draw:text-box>
        </draw:frame>
        <draw:polygon draw:style-name="gr5" draw:text-style-name="P6" draw:layer="layout" svg:width="18.862cm" svg:height="0.736cm" svg:x="1.203cm" svg:y="8.325cm" svg:viewBox="0 0 18863 737" draw:points="0,0 18863,0 18863,737 0,737">
          <text:p/>
        </draw:polygon>
        <draw:frame draw:style-name="gr3" draw:text-style-name="P4" draw:layer="layout" svg:width="5.639cm" svg:height="0.543cm" svg:x="7.734cm" svg:y="7.058cm">
          <draw:text-box>
            <text:p text:style-name="P1"><text:span text:style-name="T6">Рисунок 12 – Содержимое </text:span></text:p>
          </draw:text-box>
        </draw:frame>
        <draw:frame draw:style-name="gr3" draw:text-style-name="P4" draw:layer="layout" svg:width="0.49cm" svg:height="0.543cm" svg:x="1.254cm" svg:y="8.506cm">
          <draw:text-box>
            <text:p text:style-name="P1"><text:span text:style-name="T9">2.</text:span></text:p>
          </draw:text-box>
        </draw:frame>
        <draw:frame draw:style-name="gr3" draw:text-style-name="P4" draw:layer="layout" svg:width="0.49cm" svg:height="0.552cm" svg:x="1.626cm" svg:y="8.499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862cm" svg:height="3.268cm" svg:x="1.203cm" svg:y="9.062cm" svg:viewBox="0 0 18863 3269" draw:points="0,0 18863,0 18863,3269 0,3269">
          <text:p/>
        </draw:polygon>
        <draw:frame draw:style-name="gr3" draw:text-style-name="P4" draw:layer="layout" svg:width="17.489cm" svg:height="0.543cm" svg:x="2.253cm" svg:y="8.506cm">
          <draw:text-box>
            <text:p text:style-name="P1"><text:span text:style-name="T9">Назначьте на каталог права 000 и проверьте, что нельзя просмотреть содержимое <text:s text:c="2"/></text:span></text:p>
          </draw:text-box>
        </draw:frame>
        <draw:frame draw:style-name="gr3" draw:text-style-name="P4" draw:layer="layout" svg:width="0.49cm" svg:height="0.543cm" svg:x="18.439cm" svg:y="11.88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6.268cm" svg:height="0.543cm" svg:x="7.411cm" svg:y="12.554cm">
          <draw:text-box>
            <text:p text:style-name="P1"><text:span text:style-name="T6">Рисунок 13 – <text:s/>Ошибки ls и cd </text:span></text:p>
          </draw:text-box>
        </draw:frame>
        <draw:polygon draw:style-name="gr5" draw:text-style-name="P6" draw:layer="layout" svg:width="18.87cm" svg:height="0.737cm" svg:x="1.186cm" svg:y="14.668cm" svg:viewBox="0 0 18871 738" draw:points="0,0 18871,0 18871,738 0,738">
          <text:p/>
        </draw:polygon>
        <draw:frame draw:style-name="gr3" draw:text-style-name="P4" draw:layer="layout" svg:width="0.49cm" svg:height="0.543cm" svg:x="10.503cm" svg:y="13.40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cm" svg:height="0.543cm" svg:x="1.237cm" svg:y="14.849cm">
          <draw:text-box>
            <text:p text:style-name="P1"><text:span text:style-name="T9">3.</text:span></text:p>
          </draw:text-box>
        </draw:frame>
        <draw:frame draw:style-name="gr3" draw:text-style-name="P4" draw:layer="layout" svg:width="0.49cm" svg:height="0.552cm" svg:x="1.61cm" svg:y="14.842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87cm" svg:height="0.745cm" svg:x="1.186cm" svg:y="15.405cm" svg:viewBox="0 0 18871 746" draw:points="0,0 18871,0 18871,746 0,746">
          <text:p/>
        </draw:polygon>
        <draw:frame draw:style-name="gr3" draw:text-style-name="P4" draw:layer="layout" svg:width="18.286cm" svg:height="0.543cm" svg:x="2.253cm" svg:y="14.849cm">
          <draw:text-box>
            <text:p text:style-name="P1"><text:span text:style-name="T9">Назначьте <text:s/>права <text:s/>400 <text:s/>(только <text:s/>чтение) <text:s/>и <text:s/>проверьте <text:s/>возможность <text:s/>просмотра <text:s/>списка </text:span></text:p>
          </draw:text-box>
        </draw:frame>
        <draw:polygon draw:style-name="gr5" draw:text-style-name="P6" draw:layer="layout" svg:width="20.997cm" svg:height="3.531cm" svg:x="0cm" svg:y="16.574cm" svg:viewBox="0 0 20998 3532" draw:points="0,0 20998,0 20998,3532 0,3532">
          <text:p/>
        </draw:polygon>
        <draw:frame draw:style-name="gr3" draw:text-style-name="P4" draw:layer="layout" svg:width="6.282cm" svg:height="0.543cm" svg:x="1.254cm" svg:y="15.594cm">
          <draw:text-box>
            <text:p text:style-name="P1"><text:span text:style-name="T9">файлов, но без доступа к ним </text:span></text:p>
          </draw:text-box>
        </draw:frame>
        <draw:frame draw:style-name="gr3" draw:text-style-name="P4" draw:layer="layout" svg:width="0.49cm" svg:height="0.543cm" svg:x="18.058cm" svg:y="19.668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8.853cm" svg:height="0.738cm" svg:x="1.203cm" svg:y="21.595cm" svg:viewBox="0 0 18854 739" draw:points="0,0 18854,0 18854,739 0,739">
          <text:p/>
        </draw:polygon>
        <draw:frame draw:style-name="gr3" draw:text-style-name="P4" draw:layer="layout" svg:width="9.252cm" svg:height="0.543cm" svg:x="5.912cm" svg:y="20.329cm">
          <draw:text-box>
            <text:p text:style-name="P1"><text:span text:style-name="T6">Рисунок 14 – Вывод ls и ошибки cat и touch</text:span><text:span text:style-name="T9"> </text:span></text:p>
          </draw:text-box>
        </draw:frame>
        <draw:frame draw:style-name="gr3" draw:text-style-name="P4" draw:layer="layout" svg:width="0.49cm" svg:height="0.543cm" svg:x="1.254cm" svg:y="21.786cm">
          <draw:text-box>
            <text:p text:style-name="P1"><text:span text:style-name="T9">4.</text:span></text:p>
          </draw:text-box>
        </draw:frame>
        <draw:frame draw:style-name="gr3" draw:text-style-name="P4" draw:layer="layout" svg:width="0.49cm" svg:height="0.552cm" svg:x="1.626cm" svg:y="21.779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0.997cm" svg:height="4.175cm" svg:x="0cm" svg:y="22.756cm" svg:viewBox="0 0 20998 4176" draw:points="0,0 20998,0 20998,4176 0,4176">
          <text:p/>
        </draw:polygon>
        <draw:frame draw:style-name="gr3" draw:text-style-name="P4" draw:layer="layout" svg:width="16.7cm" svg:height="0.543cm" svg:x="2.253cm" svg:y="21.786cm">
          <draw:text-box>
            <text:p text:style-name="P1"><text:span text:style-name="T9">Назначьте права 600 (чтение+запись) и убедитесь, что ситуация не изменилась </text:span></text:p>
          </draw:text-box>
        </draw:frame>
        <draw:frame draw:style-name="gr3" draw:text-style-name="P4" draw:layer="layout" svg:width="0.49cm" svg:height="0.543cm" svg:x="19.71cm" svg:y="26.49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5.934cm" svg:height="0.543cm" svg:x="7.58cm" svg:y="27.154cm">
          <draw:text-box>
            <text:p text:style-name="P1"><text:span text:style-name="T6">Рисунок 15 – Те же ошибки </text:span></text:p>
          </draw:text-box>
        </draw:frame>
        <draw:frame draw:style-name="gr8" draw:text-style-name="P9" draw:layer="layout" svg:width="16.012cm" svg:height="3.267cm" svg:x="2.51cm" svg:y="3.567cm">
          <draw:image xlink:href="Pictures/100000010000026A0000006830EBFBE7.png" xlink:type="simple" xlink:show="embed" xlink:actuate="onLoad" draw:mime-type="image/png">
            <text:p/>
          </draw:image>
        </draw:frame>
        <draw:frame draw:style-name="gr8" draw:text-style-name="P9" draw:layer="layout" svg:width="15.546cm" svg:height="3.26cm" svg:x="2.873cm" svg:y="9.063cm">
          <draw:image xlink:href="Pictures/10000001000002CE0000008EC7F04EE3.png" xlink:type="simple" xlink:show="embed" xlink:actuate="onLoad" draw:mime-type="image/png">
            <text:p/>
          </draw:image>
        </draw:frame>
        <draw:frame draw:style-name="gr8" draw:text-style-name="P9" draw:layer="layout" svg:width="15.04cm" svg:height="3.532cm" svg:x="3.005cm" svg:y="16.568cm">
          <draw:image xlink:href="Pictures/10000001000002FC000000DC5F1E9114.png" xlink:type="simple" xlink:show="embed" xlink:actuate="onLoad" draw:mime-type="image/png">
            <text:p/>
          </draw:image>
        </draw:frame>
        <draw:frame draw:style-name="gr8" draw:text-style-name="P9" draw:layer="layout" svg:width="18.345cm" svg:height="4.172cm" svg:x="1.346cm" svg:y="22.752cm">
          <draw:image xlink:href="Pictures/10000001000002F1000000EC50CB04A0.png" xlink:type="simple" xlink:show="embed" xlink:actuate="onLoad" draw:mime-type="image/png">
            <text:p/>
          </draw:image>
        </draw:frame>
        <draw:frame draw:style-name="gr3" draw:text-style-name="P4" draw:layer="layout" svg:width="0.49cm" svg:height="0.543cm" svg:x="10.503cm" svg:y="28.01cm">
          <draw:text-box>
            <text:p text:style-name="P1"><text:span text:style-name="T6"><text:s/></text:span></text:p>
          </draw:text-box>
        </draw:frame>
      </draw:page>
      <draw:page draw:name="page6" draw:style-name="dp1" draw:master-page-name="master-page54">
        <draw:polygon draw:style-name="gr5" draw:text-style-name="P6" draw:layer="layout" svg:width="18.87cm" svg:height="0.737cm" svg:x="1.186cm" svg:y="1.837cm" svg:viewBox="0 0 18871 738" draw:points="0,0 18871,0 18871,738 0,738">
          <text:p/>
        </draw:polygon>
        <draw:frame draw:style-name="gr3" draw:text-style-name="P4" draw:layer="layout" svg:width="0.49cm" svg:height="0.543cm" svg:x="1.237cm" svg:y="2.027cm">
          <draw:text-box>
            <text:p text:style-name="P1"><text:span text:style-name="T9">5.</text:span></text:p>
          </draw:text-box>
        </draw:frame>
        <draw:frame draw:style-name="gr3" draw:text-style-name="P4" draw:layer="layout" svg:width="0.49cm" svg:height="0.552cm" svg:x="1.61cm" svg:y="2.02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0.997cm" svg:height="3.878cm" svg:x="0cm" svg:y="2.998cm" svg:viewBox="0 0 20998 3879" draw:points="0,0 20998,0 20998,3879 0,3879">
          <text:p/>
        </draw:polygon>
        <draw:frame draw:style-name="gr3" draw:text-style-name="P4" draw:layer="layout" svg:width="12.899cm" svg:height="0.543cm" svg:x="2.253cm" svg:y="2.027cm">
          <draw:text-box>
            <text:p text:style-name="P1"><text:span text:style-name="T9">Назначьте права 700 (rwx для владельца) и проверьте доступ </text:span></text:p>
          </draw:text-box>
        </draw:frame>
        <draw:frame draw:style-name="gr3" draw:text-style-name="P4" draw:layer="layout" svg:width="0.49cm" svg:height="0.543cm" svg:x="15.771cm" svg:y="6.439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17.854cm" svg:height="0.737cm" svg:x="2.202cm" svg:y="8.367cm" svg:viewBox="0 0 17855 738" draw:points="0,0 17855,0 17855,738 0,738">
          <text:p/>
        </draw:polygon>
        <draw:frame draw:style-name="gr3" draw:text-style-name="P4" draw:layer="layout" svg:width="8.352cm" svg:height="0.543cm" svg:x="6.369cm" svg:y="7.1cm">
          <draw:text-box>
            <text:p text:style-name="P1"><text:span text:style-name="T6">Рисунок 16 – Все операции выполнены </text:span></text:p>
          </draw:text-box>
        </draw:frame>
        <draw:frame draw:style-name="gr8" draw:text-style-name="P9" draw:layer="layout" svg:width="10.464cm" svg:height="3.876cm" svg:x="5.289cm" svg:y="2.999cm">
          <draw:image xlink:href="Pictures/10000001000001690000003CC932707F.png" xlink:type="simple" xlink:show="embed" xlink:actuate="onLoad" draw:mime-type="image/png">
            <text:p/>
          </draw:image>
        </draw:frame>
        <draw:frame draw:style-name="gr3" draw:text-style-name="P4" draw:layer="layout" svg:width="0.49cm" svg:height="0.543cm" svg:x="2.253cm" svg:y="8.557cm">
          <draw:text-box>
            <text:p text:style-name="P1"><text:span text:style-name="T9"><text:s/></text:span></text:p>
          </draw:text-box>
        </draw:frame>
      </draw:page>
      <draw:page draw:name="page7" draw:style-name="dp1" draw:master-page-name="master-page47">
        <draw:polygon draw:style-name="gr5" draw:text-style-name="P6" draw:layer="layout" svg:width="18.862cm" svg:height="0.737cm" svg:x="1.203cm" svg:y="2.828cm" svg:viewBox="0 0 18863 738" draw:points="0,0 18863,0 18863,738 0,738">
          <text:p/>
        </draw:polygon>
        <draw:frame draw:style-name="gr3" draw:text-style-name="P4" draw:layer="layout" svg:width="2.398cm" svg:height="0.543cm" svg:x="3.252cm" svg:y="1.858cm">
          <draw:text-box>
            <text:p text:style-name="P1"><text:span text:style-name="T4">Задание 4. </text:span></text:p>
          </draw:text-box>
        </draw:frame>
        <draw:frame draw:style-name="gr3" draw:text-style-name="P4" draw:layer="layout" svg:width="0.49cm" svg:height="0.543cm" svg:x="1.254cm" svg:y="3.009cm">
          <draw:text-box>
            <text:p text:style-name="P1"><text:span text:style-name="T9">1.</text:span></text:p>
          </draw:text-box>
        </draw:frame>
        <draw:frame draw:style-name="gr3" draw:text-style-name="P4" draw:layer="layout" svg:width="0.49cm" svg:height="0.552cm" svg:x="1.626cm" svg:y="3.00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2.155cm" svg:height="0.543cm" svg:x="2.253cm" svg:y="3.009cm">
          <draw:text-box>
            <text:p text:style-name="P1"><text:span text:style-name="T9">От root создайте файл ~/file2.txt с правами по умолчанию </text:span></text:p>
          </draw:text-box>
        </draw:frame>
        <draw:polygon draw:style-name="gr5" draw:text-style-name="P6" draw:layer="layout" svg:width="18.862cm" svg:height="4.396cm" svg:x="1.203cm" svg:y="3.565cm" svg:viewBox="0 0 18863 4397" draw:points="0,0 18863,0 18863,4397 0,4397">
          <text:p/>
        </draw:polygon>
        <draw:frame draw:style-name="gr1" draw:text-style-name="P2" draw:layer="layout" svg:width="0.422cm" svg:height="0.471cm" svg:x="14.746cm" svg:y="3.06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16.932cm" svg:y="7.584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5.234cm" svg:height="0.543cm" svg:x="7.937cm" svg:y="8.184cm">
          <draw:text-box>
            <text:p text:style-name="P1"><text:span text:style-name="T6">Рисунок 17 – Вывод ls -l </text:span></text:p>
          </draw:text-box>
        </draw:frame>
        <draw:frame draw:style-name="gr3" draw:text-style-name="P4" draw:layer="layout" svg:width="0.49cm" svg:height="0.543cm" svg:x="1.254cm" svg:y="9.64cm">
          <draw:text-box>
            <text:p text:style-name="P1"><text:span text:style-name="T9">2.</text:span></text:p>
          </draw:text-box>
        </draw:frame>
        <draw:frame draw:style-name="gr3" draw:text-style-name="P4" draw:layer="layout" svg:width="0.49cm" svg:height="0.552cm" svg:x="1.626cm" svg:y="9.633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0.997cm" svg:height="2.057cm" svg:x="0cm" svg:y="10.612cm" svg:viewBox="0 0 20998 2058" draw:points="0,0 20998,0 20998,2058 0,2058">
          <text:p/>
        </draw:polygon>
        <draw:frame draw:style-name="gr3" draw:text-style-name="P4" draw:layer="layout" svg:width="15.259cm" svg:height="0.543cm" svg:x="2.253cm" svg:y="9.64cm">
          <draw:text-box>
            <text:p text:style-name="P1"><text:span text:style-name="T9">Назначьте на файл права 007 (владелец и группа ничего, остальные всё) </text:span></text:p>
          </draw:text-box>
        </draw:frame>
        <draw:frame draw:style-name="gr3" draw:text-style-name="P4" draw:layer="layout" svg:width="0.49cm" svg:height="0.543cm" svg:x="18.388cm" svg:y="12.22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8.093cm" svg:height="0.543cm" svg:x="6.496cm" svg:y="12.893cm">
          <draw:text-box>
            <text:p text:style-name="P1"><text:span text:style-name="T6">Рисунок 18 – <text:s/>ls -l с правами -------rwx </text:span></text:p>
          </draw:text-box>
        </draw:frame>
        <draw:frame draw:style-name="gr3" draw:text-style-name="P4" draw:layer="layout" svg:width="0.49cm" svg:height="0.543cm" svg:x="1.254cm" svg:y="13.74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9cm" svg:height="0.543cm" svg:x="1.237cm" svg:y="14.773cm">
          <draw:text-box>
            <text:p text:style-name="P1"><text:span text:style-name="T9">3.</text:span></text:p>
          </draw:text-box>
        </draw:frame>
        <draw:frame draw:style-name="gr3" draw:text-style-name="P4" draw:layer="layout" svg:width="0.49cm" svg:height="0.552cm" svg:x="1.61cm" svg:y="14.766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20.997cm" svg:height="5.716cm" svg:x="0cm" svg:y="15.752cm" svg:viewBox="0 0 20998 5717" draw:points="0,0 20998,0 20998,5717 0,5717">
          <text:p/>
        </draw:polygon>
        <draw:frame draw:style-name="gr3" draw:text-style-name="P4" draw:layer="layout" svg:width="15.579cm" svg:height="0.543cm" svg:x="2.253cm" svg:y="14.773cm">
          <draw:text-box>
            <text:p text:style-name="P1"><text:span text:style-name="T9">Добавьте пользователя user1 в ACL файла с правами только на чтение (4) </text:span></text:p>
          </draw:text-box>
        </draw:frame>
        <draw:frame draw:style-name="gr3" draw:text-style-name="P4" draw:layer="layout" svg:width="0.49cm" svg:height="0.543cm" svg:x="15.381cm" svg:y="21.0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3.162cm" svg:height="0.543cm" svg:x="3.947cm" svg:y="21.692cm">
          <draw:text-box>
            <text:p text:style-name="P1"><text:span text:style-name="T6">Рисунок 19 – <text:s/>Вывод getfacl, успешное чтение, ошибка записи </text:span></text:p>
          </draw:text-box>
        </draw:frame>
        <draw:frame draw:style-name="gr3" draw:text-style-name="P4" draw:layer="layout" svg:width="0.49cm" svg:height="0.543cm" svg:x="1.237cm" svg:y="23.149cm">
          <draw:text-box>
            <text:p text:style-name="P1"><text:span text:style-name="T9">4.</text:span></text:p>
          </draw:text-box>
        </draw:frame>
        <draw:frame draw:style-name="gr3" draw:text-style-name="P4" draw:layer="layout" svg:width="0.49cm" svg:height="0.552cm" svg:x="1.61cm" svg:y="23.14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0.473cm" svg:height="0.543cm" svg:x="2.253cm" svg:y="23.149cm">
          <draw:text-box>
            <text:p text:style-name="P1"><text:span text:style-name="T9">Установите на файл маску ACL с правами 0 (m::) </text:span></text:p>
          </draw:text-box>
        </draw:frame>
        <draw:frame draw:style-name="gr3" draw:text-style-name="P4" draw:layer="layout" svg:width="0.49cm" svg:height="0.543cm" svg:x="16.321cm" svg:y="27.256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12.541cm" svg:height="4.393cm" svg:x="4.38cm" svg:y="3.567cm">
          <draw:image xlink:href="Pictures/10000001000002540000007A814C46A2.png" xlink:type="simple" xlink:show="embed" xlink:actuate="onLoad" draw:mime-type="image/png">
            <text:p/>
          </draw:image>
        </draw:frame>
        <draw:frame draw:style-name="gr8" draw:text-style-name="P9" draw:layer="layout" svg:width="15.689cm" svg:height="2.052cm" svg:x="2.669cm" svg:y="10.612cm">
          <draw:image xlink:href="Pictures/100000010000025A000000420963555E.png" xlink:type="simple" xlink:show="embed" xlink:actuate="onLoad" draw:mime-type="image/png">
            <text:p/>
          </draw:image>
        </draw:frame>
        <draw:frame draw:style-name="gr8" draw:text-style-name="P9" draw:layer="layout" svg:width="9.704cm" svg:height="5.719cm" svg:x="5.674cm" svg:y="15.744cm">
          <draw:image xlink:href="Pictures/100000010000024200000155326C294A.png" xlink:type="simple" xlink:show="embed" xlink:actuate="onLoad" draw:mime-type="image/png">
            <text:p/>
          </draw:image>
        </draw:frame>
        <draw:frame draw:style-name="gr8" draw:text-style-name="P9" draw:layer="layout" svg:width="11.583cm" svg:height="3.576cm" svg:x="4.733cm" svg:y="24.116cm">
          <draw:image xlink:href="Pictures/100000010000020F000000C7AE7BCA45.png" xlink:type="simple" xlink:show="embed" xlink:actuate="onLoad" draw:mime-type="image/png">
            <text:p/>
          </draw:image>
        </draw:frame>
        <draw:frame draw:style-name="gr3" draw:text-style-name="P4" draw:layer="layout" svg:width="11.769cm" svg:height="0.543cm" svg:x="4.65cm" svg:y="27.926cm">
          <draw:text-box>
            <text:p text:style-name="P1"><text:span text:style-name="T6">Рисунок 20 – <text:s/>Отказ в доступе, вывод getfacl с маской 0 </text:span></text:p>
          </draw:text-box>
        </draw:frame>
      </draw:page>
      <draw:page draw:name="page8" draw:style-name="dp1" draw:master-page-name="master-page57">
        <draw:polygon draw:style-name="gr5" draw:text-style-name="P6" draw:layer="layout" svg:width="18.489cm" svg:height="0.567cm" svg:x="1.567cm" svg:y="2.896cm" svg:viewBox="0 0 18490 568" draw:points="0,0 18490,0 18490,568 0,568">
          <text:p/>
        </draw:polygon>
        <draw:frame draw:style-name="gr3" draw:text-style-name="P4" draw:layer="layout" svg:width="2.101cm" svg:height="0.543cm" svg:x="3.252cm" svg:y="1.858cm">
          <draw:text-box>
            <text:p text:style-name="P1"><text:span text:style-name="T4">Вопросы </text:span></text:p>
          </draw:text-box>
        </draw:frame>
        <draw:frame draw:style-name="gr3" draw:text-style-name="P4" draw:layer="layout" svg:width="0.49cm" svg:height="0.543cm" svg:x="1.618cm" svg:y="2.916cm">
          <draw:text-box>
            <text:p text:style-name="P1"><text:span text:style-name="T9">1.</text:span></text:p>
          </draw:text-box>
        </draw:frame>
        <draw:frame draw:style-name="gr3" draw:text-style-name="P4" draw:layer="layout" svg:width="0.49cm" svg:height="0.552cm" svg:x="1.991cm" svg:y="2.909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67cm" svg:x="1.567cm" svg:y="3.463cm" svg:viewBox="0 0 18490 568" draw:points="0,0 18490,0 18490,568 0,568">
          <text:p/>
        </draw:polygon>
        <draw:polygon draw:style-name="gr9" draw:text-style-name="P10" draw:layer="layout" svg:width="1.313cm" svg:height="0.592cm" svg:x="3.887cm" svg:y="3.438cm" svg:viewBox="0 0 1314 593" draw:points="0,0 1314,0 1314,593 0,593">
          <text:p/>
        </draw:polygon>
        <draw:polygon draw:style-name="gr9" draw:text-style-name="P10" draw:layer="layout" svg:width="4.336cm" svg:height="0.592cm" svg:x="7.784cm" svg:y="3.438cm" svg:viewBox="0 0 4337 593" draw:points="0,0 4337,0 4337,593 0,593">
          <text:p/>
        </draw:polygon>
        <draw:frame draw:style-name="gr3" draw:text-style-name="P4" draw:layer="layout" svg:width="13.349cm" svg:height="0.543cm" svg:x="2.253cm" svg:y="2.916cm">
          <draw:text-box>
            <text:p text:style-name="P1"><text:span text:style-name="T12">Какой командой можно изменить владельца файла/папки? </text:span></text:p>
          </draw:text-box>
        </draw:frame>
        <draw:polygon draw:style-name="gr5" draw:text-style-name="P6" draw:layer="layout" svg:width="18.489cm" svg:height="0.568cm" svg:x="1.567cm" svg:y="4.031cm" svg:viewBox="0 0 18490 569" draw:points="0,0 18490,0 18490,569 0,569">
          <text:p/>
        </draw:polygon>
        <draw:frame draw:style-name="gr3" draw:text-style-name="P4" draw:layer="layout" svg:width="10.222cm" svg:height="0.543cm" svg:x="2.253cm" svg:y="3.475cm">
          <draw:text-box>
            <text:p text:style-name="P1"><text:span text:style-name="T12">Ответ: </text:span><text:span text:style-name="T9">chown (например, chown user:group file). </text:span></text:p>
          </draw:text-box>
        </draw:frame>
        <draw:frame draw:style-name="gr3" draw:text-style-name="P4" draw:layer="layout" svg:width="0.49cm" svg:height="0.543cm" svg:x="1.618cm" svg:y="4.052cm">
          <draw:text-box>
            <text:p text:style-name="P1"><text:span text:style-name="T9">2.</text:span></text:p>
          </draw:text-box>
        </draw:frame>
        <draw:frame draw:style-name="gr3" draw:text-style-name="P4" draw:layer="layout" svg:width="0.49cm" svg:height="0.552cm" svg:x="1.991cm" svg:y="4.045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67cm" svg:x="1.567cm" svg:y="4.599cm" svg:viewBox="0 0 18490 568" draw:points="0,0 18490,0 18490,568 0,568">
          <text:p/>
        </draw:polygon>
        <draw:polygon draw:style-name="gr9" draw:text-style-name="P10" draw:layer="layout" svg:width="1.347cm" svg:height="0.593cm" svg:x="3.887cm" svg:y="4.573cm" svg:viewBox="0 0 1348 594" draw:points="0,0 1348,0 1348,594 0,594">
          <text:p/>
        </draw:polygon>
        <draw:polygon draw:style-name="gr9" draw:text-style-name="P10" draw:layer="layout" svg:width="2.998cm" svg:height="0.593cm" svg:x="7.809cm" svg:y="4.573cm" svg:viewBox="0 0 2999 594" draw:points="0,0 2999,0 2999,594 0,594">
          <text:p/>
        </draw:polygon>
        <draw:frame draw:style-name="gr3" draw:text-style-name="P4" draw:layer="layout" svg:width="14.563cm" svg:height="0.543cm" svg:x="2.253cm" svg:y="4.052cm">
          <draw:text-box>
            <text:p text:style-name="P1"><text:span text:style-name="T12">Какой командой можно изменить права доступа на файл/папку? </text:span></text:p>
          </draw:text-box>
        </draw:frame>
        <draw:polygon draw:style-name="gr5" draw:text-style-name="P6" draw:layer="layout" svg:width="18.489cm" svg:height="0.567cm" svg:x="1.567cm" svg:y="5.166cm" svg:viewBox="0 0 18490 568" draw:points="0,0 18490,0 18490,568 0,568">
          <text:p/>
        </draw:polygon>
        <draw:frame draw:style-name="gr3" draw:text-style-name="P4" draw:layer="layout" svg:width="8.913cm" svg:height="0.543cm" svg:x="2.253cm" svg:y="4.61cm">
          <draw:text-box>
            <text:p text:style-name="P1"><text:span text:style-name="T12">Ответ: </text:span><text:span text:style-name="T9">chmod (например, chmod 755 file). </text:span></text:p>
          </draw:text-box>
        </draw:frame>
        <draw:frame draw:style-name="gr3" draw:text-style-name="P4" draw:layer="layout" svg:width="0.49cm" svg:height="0.543cm" svg:x="1.618cm" svg:y="5.186cm">
          <draw:text-box>
            <text:p text:style-name="P1"><text:span text:style-name="T9">3.</text:span></text:p>
          </draw:text-box>
        </draw:frame>
        <draw:frame draw:style-name="gr3" draw:text-style-name="P4" draw:layer="layout" svg:width="0.49cm" svg:height="0.552cm" svg:x="1.991cm" svg:y="5.179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76cm" svg:x="1.567cm" svg:y="5.733cm" svg:viewBox="0 0 18490 577" draw:points="0,0 18490,0 18490,577 0,577">
          <text:p/>
        </draw:polygon>
        <draw:frame draw:style-name="gr3" draw:text-style-name="P4" draw:layer="layout" svg:width="6.723cm" svg:height="0.543cm" svg:x="2.253cm" svg:y="5.186cm">
          <draw:text-box>
            <text:p text:style-name="P1"><text:span text:style-name="T12">Что дает право read на файл? </text:span></text:p>
          </draw:text-box>
        </draw:frame>
        <draw:polygon draw:style-name="gr5" draw:text-style-name="P6" draw:layer="layout" svg:width="18.489cm" svg:height="0.567cm" svg:x="1.567cm" svg:y="6.309cm" svg:viewBox="0 0 18490 568" draw:points="0,0 18490,0 18490,568 0,568">
          <text:p/>
        </draw:polygon>
        <draw:frame draw:style-name="gr3" draw:text-style-name="P4" draw:layer="layout" svg:width="8.741cm" svg:height="0.543cm" svg:x="2.253cm" svg:y="5.745cm">
          <draw:text-box>
            <text:p text:style-name="P1"><text:span text:style-name="T12">Ответ: </text:span><text:span text:style-name="T9">Право читать содержимое файла. </text:span></text:p>
          </draw:text-box>
        </draw:frame>
        <draw:frame draw:style-name="gr3" draw:text-style-name="P4" draw:layer="layout" svg:width="0.49cm" svg:height="0.543cm" svg:x="1.618cm" svg:y="6.329cm">
          <draw:text-box>
            <text:p text:style-name="P1"><text:span text:style-name="T9">4.</text:span></text:p>
          </draw:text-box>
        </draw:frame>
        <draw:frame draw:style-name="gr3" draw:text-style-name="P4" draw:layer="layout" svg:width="0.49cm" svg:height="0.552cm" svg:x="1.991cm" svg:y="6.322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68cm" svg:x="1.567cm" svg:y="6.876cm" svg:viewBox="0 0 18490 569" draw:points="0,0 18490,0 18490,569 0,569">
          <text:p/>
        </draw:polygon>
        <draw:frame draw:style-name="gr3" draw:text-style-name="P4" draw:layer="layout" svg:width="6.859cm" svg:height="0.543cm" svg:x="2.253cm" svg:y="6.329cm">
          <draw:text-box>
            <text:p text:style-name="P1"><text:span text:style-name="T12">Что дает право write на файл? </text:span></text:p>
          </draw:text-box>
        </draw:frame>
        <draw:polygon draw:style-name="gr5" draw:text-style-name="P6" draw:layer="layout" svg:width="18.489cm" svg:height="0.567cm" svg:x="1.567cm" svg:y="7.444cm" svg:viewBox="0 0 18490 568" draw:points="0,0 18490,0 18490,568 0,568">
          <text:p/>
        </draw:polygon>
        <draw:frame draw:style-name="gr3" draw:text-style-name="P4" draw:layer="layout" svg:width="16.515cm" svg:height="0.543cm" svg:x="2.253cm" svg:y="6.888cm">
          <draw:text-box>
            <text:p text:style-name="P1"><text:span text:style-name="T12">Ответ: </text:span><text:span text:style-name="T9">Право изменять содержимое файла (перезаписывать или дописывать). </text:span></text:p>
          </draw:text-box>
        </draw:frame>
        <draw:frame draw:style-name="gr3" draw:text-style-name="P4" draw:layer="layout" svg:width="0.49cm" svg:height="0.543cm" svg:x="1.618cm" svg:y="7.464cm">
          <draw:text-box>
            <text:p text:style-name="P1"><text:span text:style-name="T9">5.</text:span></text:p>
          </draw:text-box>
        </draw:frame>
        <draw:frame draw:style-name="gr3" draw:text-style-name="P4" draw:layer="layout" svg:width="0.49cm" svg:height="0.552cm" svg:x="1.991cm" svg:y="7.457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68cm" svg:x="1.567cm" svg:y="8.011cm" svg:viewBox="0 0 18490 569" draw:points="0,0 18490,0 18490,569 0,569">
          <text:p/>
        </draw:polygon>
        <draw:frame draw:style-name="gr3" draw:text-style-name="P4" draw:layer="layout" svg:width="7.323cm" svg:height="0.543cm" svg:x="2.253cm" svg:y="7.464cm">
          <draw:text-box>
            <text:p text:style-name="P1"><text:span text:style-name="T12">Что дает право execute на файл? </text:span></text:p>
          </draw:text-box>
        </draw:frame>
        <draw:polygon draw:style-name="gr5" draw:text-style-name="P6" draw:layer="layout" svg:width="18.489cm" svg:height="0.567cm" svg:x="1.567cm" svg:y="8.579cm" svg:viewBox="0 0 18490 568" draw:points="0,0 18490,0 18490,568 0,568">
          <text:p/>
        </draw:polygon>
        <draw:frame draw:style-name="gr3" draw:text-style-name="P4" draw:layer="layout" svg:width="11.305cm" svg:height="0.543cm" svg:x="2.253cm" svg:y="8.023cm">
          <draw:text-box>
            <text:p text:style-name="P1"><text:span text:style-name="T12">Ответ: </text:span><text:span text:style-name="T9">Право запускать файл как программу/скрипт. </text:span></text:p>
          </draw:text-box>
        </draw:frame>
        <draw:frame draw:style-name="gr3" draw:text-style-name="P4" draw:layer="layout" svg:width="0.49cm" svg:height="0.543cm" svg:x="1.618cm" svg:y="8.599cm">
          <draw:text-box>
            <text:p text:style-name="P1"><text:span text:style-name="T9">6.</text:span></text:p>
          </draw:text-box>
        </draw:frame>
        <draw:frame draw:style-name="gr3" draw:text-style-name="P4" draw:layer="layout" svg:width="0.49cm" svg:height="0.552cm" svg:x="1.991cm" svg:y="8.592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67cm" svg:x="1.567cm" svg:y="9.146cm" svg:viewBox="0 0 18490 568" draw:points="0,0 18490,0 18490,568 0,568">
          <text:p/>
        </draw:polygon>
        <draw:frame draw:style-name="gr3" draw:text-style-name="P4" draw:layer="layout" svg:width="6.92cm" svg:height="0.543cm" svg:x="2.253cm" svg:y="8.599cm">
          <draw:text-box>
            <text:p text:style-name="P1"><text:span text:style-name="T12">Что дает право read на папку? </text:span></text:p>
          </draw:text-box>
        </draw:frame>
        <draw:polygon draw:style-name="gr5" draw:text-style-name="P6" draw:layer="layout" svg:width="18.489cm" svg:height="0.568cm" svg:x="1.567cm" svg:y="9.713cm" svg:viewBox="0 0 18490 569" draw:points="0,0 18490,0 18490,569 0,569">
          <text:p/>
        </draw:polygon>
        <draw:frame draw:style-name="gr3" draw:text-style-name="P4" draw:layer="layout" svg:width="15.566cm" svg:height="0.543cm" svg:x="2.253cm" svg:y="9.158cm">
          <draw:text-box>
            <text:p text:style-name="P1"><text:span text:style-name="T12">Ответ: </text:span><text:span text:style-name="T9">Право читать список имён файлов в папке (но не их метаданные). </text:span></text:p>
          </draw:text-box>
        </draw:frame>
        <draw:frame draw:style-name="gr3" draw:text-style-name="P4" draw:layer="layout" svg:width="0.49cm" svg:height="0.543cm" svg:x="1.618cm" svg:y="9.733cm">
          <draw:text-box>
            <text:p text:style-name="P1"><text:span text:style-name="T9">7.</text:span></text:p>
          </draw:text-box>
        </draw:frame>
        <draw:frame draw:style-name="gr3" draw:text-style-name="P4" draw:layer="layout" svg:width="0.49cm" svg:height="0.552cm" svg:x="1.991cm" svg:y="9.727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68cm" svg:x="1.567cm" svg:y="10.281cm" svg:viewBox="0 0 18490 569" draw:points="0,0 18490,0 18490,569 0,569">
          <text:p/>
        </draw:polygon>
        <draw:frame draw:style-name="gr3" draw:text-style-name="P4" draw:layer="layout" svg:width="7.056cm" svg:height="0.543cm" svg:x="2.253cm" svg:y="9.733cm">
          <draw:text-box>
            <text:p text:style-name="P1"><text:span text:style-name="T12">Что дает право write на папку? </text:span></text:p>
          </draw:text-box>
        </draw:frame>
        <draw:polygon draw:style-name="gr5" draw:text-style-name="P6" draw:layer="layout" svg:width="18.489cm" svg:height="0.567cm" svg:x="1.567cm" svg:y="10.849cm" svg:viewBox="0 0 18490 568" draw:points="0,0 18490,0 18490,568 0,568">
          <text:p/>
        </draw:polygon>
        <draw:frame draw:style-name="gr3" draw:text-style-name="P4" draw:layer="layout" svg:width="16.088cm" svg:height="0.543cm" svg:x="2.253cm" svg:y="10.293cm">
          <draw:text-box>
            <text:p text:style-name="P1"><text:span text:style-name="T12">Ответ: </text:span><text:span text:style-name="T9">Право создавать, удалять и переименовывать объекты внутри папки </text:span></text:p>
          </draw:text-box>
        </draw:frame>
        <draw:polygon draw:style-name="gr5" draw:text-style-name="P6" draw:layer="layout" svg:width="18.489cm" svg:height="0.567cm" svg:x="1.567cm" svg:y="11.416cm" svg:viewBox="0 0 18490 568" draw:points="0,0 18490,0 18490,568 0,568">
          <text:p/>
        </draw:polygon>
        <draw:frame draw:style-name="gr3" draw:text-style-name="P4" draw:layer="layout" svg:width="7.687cm" svg:height="0.543cm" svg:x="2.253cm" svg:y="10.861cm">
          <draw:text-box>
            <text:p text:style-name="P1"><text:span text:style-name="T9">(только при наличии права execute). </text:span></text:p>
          </draw:text-box>
        </draw:frame>
        <draw:frame draw:style-name="gr3" draw:text-style-name="P4" draw:layer="layout" svg:width="0.49cm" svg:height="0.543cm" svg:x="1.618cm" svg:y="11.436cm">
          <draw:text-box>
            <text:p text:style-name="P1"><text:span text:style-name="T9">8.</text:span></text:p>
          </draw:text-box>
        </draw:frame>
        <draw:frame draw:style-name="gr3" draw:text-style-name="P4" draw:layer="layout" svg:width="0.49cm" svg:height="0.552cm" svg:x="1.991cm" svg:y="11.429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68cm" svg:x="1.567cm" svg:y="11.983cm" svg:viewBox="0 0 18490 569" draw:points="0,0 18490,0 18490,569 0,569">
          <text:p/>
        </draw:polygon>
        <draw:polygon draw:style-name="gr9" draw:text-style-name="P10" draw:layer="layout" svg:width="0.465cm" svg:height="0.593cm" svg:x="15.288cm" svg:y="11.958cm" svg:viewBox="0 0 466 594" draw:points="0,0 466,0 466,594 0,594">
          <text:p/>
        </draw:polygon>
        <draw:frame draw:style-name="gr3" draw:text-style-name="P4" draw:layer="layout" svg:width="7.519cm" svg:height="0.543cm" svg:x="2.253cm" svg:y="11.436cm">
          <draw:text-box>
            <text:p text:style-name="P1"><text:span text:style-name="T12">Что дает право execute на папку? </text:span></text:p>
          </draw:text-box>
        </draw:frame>
        <draw:polygon draw:style-name="gr5" draw:text-style-name="P6" draw:layer="layout" svg:width="18.489cm" svg:height="0.567cm" svg:x="1.567cm" svg:y="12.551cm" svg:viewBox="0 0 18490 568" draw:points="0,0 18490,0 18490,568 0,568">
          <text:p/>
        </draw:polygon>
        <draw:polygon draw:style-name="gr9" draw:text-style-name="P10" draw:layer="layout" svg:width="0.686cm" svg:height="0.584cm" svg:x="13.475cm" svg:y="12.534cm" svg:viewBox="0 0 687 585" draw:points="0,0 687,0 687,585 0,585">
          <text:p/>
        </draw:polygon>
        <draw:frame draw:style-name="gr3" draw:text-style-name="P4" draw:layer="layout" svg:width="17.552cm" svg:height="0.543cm" svg:x="2.253cm" svg:y="11.995cm">
          <draw:text-box>
            <text:p text:style-name="P1"><text:span text:style-name="T12">Ответ: </text:span><text:span text:style-name="T9">Право "входить" в папку (переходить в неё командой cd), а также получать </text:span></text:p>
          </draw:text-box>
        </draw:frame>
        <draw:polygon draw:style-name="gr5" draw:text-style-name="P6" draw:layer="layout" svg:width="18.489cm" svg:height="0.576cm" svg:x="1.567cm" svg:y="13.118cm" svg:viewBox="0 0 18490 577" draw:points="0,0 18490,0 18490,577 0,577">
          <text:p/>
        </draw:polygon>
        <draw:frame draw:style-name="gr3" draw:text-style-name="P4" draw:layer="layout" svg:width="12.24cm" svg:height="0.543cm" svg:x="2.253cm" svg:y="12.562cm">
          <draw:text-box>
            <text:p text:style-name="P1"><text:span text:style-name="T9">доступ к метаданным файлов внутри (например, для stat). </text:span></text:p>
          </draw:text-box>
        </draw:frame>
        <draw:frame draw:style-name="gr3" draw:text-style-name="P4" draw:layer="layout" svg:width="0.49cm" svg:height="0.543cm" svg:x="1.618cm" svg:y="13.139cm">
          <draw:text-box>
            <text:p text:style-name="P1"><text:span text:style-name="T9">9.</text:span></text:p>
          </draw:text-box>
        </draw:frame>
        <draw:frame draw:style-name="gr3" draw:text-style-name="P4" draw:layer="layout" svg:width="0.49cm" svg:height="0.552cm" svg:x="1.991cm" svg:y="13.132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68cm" svg:x="1.567cm" svg:y="13.694cm" svg:viewBox="0 0 18490 569" draw:points="0,0 18490,0 18490,569 0,569">
          <text:p/>
        </draw:polygon>
        <draw:frame draw:style-name="gr3" draw:text-style-name="P4" draw:layer="layout" svg:width="10.691cm" svg:height="0.543cm" svg:x="2.253cm" svg:y="13.139cm">
          <draw:text-box>
            <text:p text:style-name="P1"><text:span text:style-name="T12">Что дает право write вместе с execute на папку? </text:span></text:p>
          </draw:text-box>
        </draw:frame>
        <draw:polygon draw:style-name="gr5" draw:text-style-name="P6" draw:layer="layout" svg:width="18.489cm" svg:height="0.567cm" svg:x="1.567cm" svg:y="14.262cm" svg:viewBox="0 0 18490 568" draw:points="0,0 18490,0 18490,568 0,568">
          <text:p/>
        </draw:polygon>
        <draw:frame draw:style-name="gr3" draw:text-style-name="P4" draw:layer="layout" svg:width="17.367cm" svg:height="0.543cm" svg:x="2.253cm" svg:y="13.706cm">
          <draw:text-box>
            <text:p text:style-name="P1"><text:span text:style-name="T12">Ответ: </text:span><text:span text:style-name="T9">Возможность создавать, удалять и переименовывать файлы внутри папки. </text:span></text:p>
          </draw:text-box>
        </draw:frame>
        <draw:frame draw:style-name="gr3" draw:text-style-name="P4" draw:layer="layout" svg:width="0.616cm" svg:height="0.543cm" svg:x="1.618cm" svg:y="14.282cm">
          <draw:text-box>
            <text:p text:style-name="P1"><text:span text:style-name="T9">10.</text:span></text:p>
          </draw:text-box>
        </draw:frame>
        <draw:frame draw:style-name="gr3" draw:text-style-name="P4" draw:layer="layout" svg:width="0.49cm" svg:height="0.552cm" svg:x="2.236cm" svg:y="14.275cm">
          <draw:text-box>
            <text:p text:style-name="P1"><text:span text:style-name="T10"><text:s/></text:span></text:p>
          </draw:text-box>
        </draw:frame>
        <draw:polygon draw:style-name="gr5" draw:text-style-name="P6" draw:layer="layout" svg:width="18.489cm" svg:height="0.567cm" svg:x="1.567cm" svg:y="14.829cm" svg:viewBox="0 0 18490 568" draw:points="0,0 18490,0 18490,568 0,568">
          <text:p/>
        </draw:polygon>
        <draw:frame draw:style-name="gr3" draw:text-style-name="P4" draw:layer="layout" svg:width="15.131cm" svg:height="0.543cm" svg:x="2.253cm" svg:y="14.282cm">
          <draw:text-box>
            <text:p text:style-name="P1"><text:span text:style-name="T12">Если обычный пользователь является владельцем файла и на него </text:span></text:p>
          </draw:text-box>
        </draw:frame>
        <draw:polygon draw:style-name="gr5" draw:text-style-name="P6" draw:layer="layout" svg:width="18.489cm" svg:height="0.567cm" svg:x="1.567cm" svg:y="15.396cm" svg:viewBox="0 0 18490 568" draw:points="0,0 18490,0 18490,568 0,568">
          <text:p/>
        </draw:polygon>
        <draw:frame draw:style-name="gr3" draw:text-style-name="P4" draw:layer="layout" svg:width="17.027cm" svg:height="0.543cm" svg:x="2.253cm" svg:y="14.849cm">
          <draw:text-box>
            <text:p text:style-name="P1"><text:span text:style-name="T12">установлены права 007, сможет ли пользователь прочитать файл командой </text:span></text:p>
          </draw:text-box>
        </draw:frame>
        <draw:polygon draw:style-name="gr5" draw:text-style-name="P6" draw:layer="layout" svg:width="18.489cm" svg:height="0.568cm" svg:x="1.567cm" svg:y="15.963cm" svg:viewBox="0 0 18490 569" draw:points="0,0 18490,0 18490,569 0,569">
          <text:p/>
        </draw:polygon>
        <draw:frame draw:style-name="gr3" draw:text-style-name="P4" draw:layer="layout" svg:width="0.997cm" svg:height="0.543cm" svg:x="2.253cm" svg:y="15.416cm">
          <draw:text-box>
            <text:p text:style-name="P1"><text:span text:style-name="T12">cat? </text:span></text:p>
          </draw:text-box>
        </draw:frame>
        <draw:polygon draw:style-name="gr5" draw:text-style-name="P6" draw:layer="layout" svg:width="18.489cm" svg:height="0.568cm" svg:x="1.567cm" svg:y="16.531cm" svg:viewBox="0 0 18490 569" draw:points="0,0 18490,0 18490,569 0,569">
          <text:p/>
        </draw:polygon>
        <draw:frame draw:style-name="gr3" draw:text-style-name="P4" draw:layer="layout" svg:width="16.686cm" svg:height="0.543cm" svg:x="2.253cm" svg:y="15.976cm">
          <draw:text-box>
            <text:p text:style-name="P1"><text:span text:style-name="T12">Ответ: </text:span><text:span text:style-name="T9">Нет, не сможет. Алгоритм проверки прав сначала смотрит, является ли </text:span></text:p>
          </draw:text-box>
        </draw:frame>
        <draw:polygon draw:style-name="gr5" draw:text-style-name="P6" draw:layer="layout" svg:width="18.489cm" svg:height="0.567cm" svg:x="1.567cm" svg:y="17.099cm" svg:viewBox="0 0 18490 568" draw:points="0,0 18490,0 18490,568 0,568">
          <text:p/>
        </draw:polygon>
        <draw:polygon draw:style-name="gr9" draw:text-style-name="P10" draw:layer="layout" svg:width="0.246cm" svg:height="0.584cm" svg:x="12.323cm" svg:y="17.082cm" svg:viewBox="0 0 247 585" draw:points="0,0 247,0 247,585 0,585">
          <text:p/>
        </draw:polygon>
        <draw:frame draw:style-name="gr3" draw:text-style-name="P4" draw:layer="layout" svg:width="17.115cm" svg:height="0.543cm" svg:x="2.253cm" svg:y="16.543cm">
          <draw:text-box>
            <text:p text:style-name="P1"><text:span text:style-name="T9">пользователь владельцем. Если да, то применяются права владельца (первые три </text:span></text:p>
          </draw:text-box>
        </draw:frame>
        <draw:polygon draw:style-name="gr5" draw:text-style-name="P6" draw:layer="layout" svg:width="18.489cm" svg:height="0.567cm" svg:x="1.567cm" svg:y="17.666cm" svg:viewBox="0 0 18490 568" draw:points="0,0 18490,0 18490,568 0,568">
          <text:p/>
        </draw:polygon>
        <draw:frame draw:style-name="gr3" draw:text-style-name="P4" draw:layer="layout" svg:width="17.682cm" svg:height="0.543cm" svg:x="2.253cm" svg:y="17.11cm">
          <draw:text-box>
            <text:p text:style-name="P1"><text:span text:style-name="T9">бита). В правах 007 для владельца установлено 0 (нет прав). Проверка завершается, </text:span></text:p>
          </draw:text-box>
        </draw:frame>
        <draw:polygon draw:style-name="gr5" draw:text-style-name="P6" draw:layer="layout" svg:width="17.854cm" svg:height="0.577cm" svg:x="2.202cm" svg:y="18.724cm" svg:viewBox="0 0 17855 578" draw:points="0,0 17855,0 17855,578 0,578">
          <text:p/>
        </draw:polygon>
        <draw:frame draw:style-name="gr3" draw:text-style-name="P4" draw:layer="layout" svg:width="12.74cm" svg:height="0.543cm" svg:x="2.253cm" svg:y="17.678cm">
          <draw:text-box>
            <text:p text:style-name="P1"><text:span text:style-name="T9">и пользователь не получает прав от категории "остальные". <text:s/></text:span></text:p>
          </draw:text-box>
        </draw:frame>
        <draw:frame draw:style-name="gr3" draw:text-style-name="P4" draw:layer="layout" svg:width="0.49cm" svg:height="0.543cm" svg:x="2.253cm" svg:y="18.736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1.5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5-19T19:58:27.967327200</dc:date>
    <meta:editing-duration>PT30M13S</meta:editing-duration>
    <meta:editing-cycles>1</meta:editing-cycles>
    <meta:document-statistic meta:object-count="341"/>
    <meta:generator>LibreOffice/26.2.2.2$Windows_X86_64 LibreOffice_project/1f77d10d6938fd34972958f64b2bcfa54f8b1ba5</meta:generator>
  </office:meta>
</office:document-meta>
</file>