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E000000630AB521F4.png" manifest:media-type="image/png"/>
  <manifest:file-entry manifest:full-path="Pictures/1000000000000281000000B19B103BC6.png" manifest:media-type="image/png"/>
  <manifest:file-entry manifest:full-path="Pictures/10000000000001D10000015592CD08ED.png" manifest:media-type="image/png"/>
  <manifest:file-entry manifest:full-path="Pictures/10000000000002E3000000F7A662C253.png" manifest:media-type="image/png"/>
  <manifest:file-entry manifest:full-path="Pictures/1000000000000423000001FAB39D2242.png" manifest:media-type="image/png"/>
  <manifest:file-entry manifest:full-path="Pictures/10000000000002250000007606F9F9A2.png" manifest:media-type="image/png"/>
  <manifest:file-entry manifest:full-path="Pictures/100000000000041D000001AD75AF32EC.png" manifest:media-type="image/png"/>
  <manifest:file-entry manifest:full-path="Pictures/100000000000015000000031995FEC7C.png" manifest:media-type="image/png"/>
  <manifest:file-entry manifest:full-path="Pictures/10000000000005440000010F8E07E272.png" manifest:media-type="image/png"/>
  <manifest:file-entry manifest:full-path="Pictures/10000000000000C80000003C6F311EEC.png" manifest:media-type="image/png"/>
  <manifest:file-entry manifest:full-path="Pictures/10000000000001EC00000069B953953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loext:decorative="false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solid" draw:fill-color="#ebeef2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47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4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ebeef2"/>
    </style:style>
    <style:style style:name="P8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9" style:family="paragraph">
      <loext:graphic-properties draw:fill="none"/>
    </style:style>
    <style:style style:name="T1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" style:family="text">
      <style:text-properties fo:color="#000000" loext:opacity="100%" style:font-name="Times New Roman" fo:font-size="13.8999996185303pt" fo:font-weight="normal" style:font-name-asian="Times New Roman" style:font-size-asian="13.8999996185303pt" style:font-weight-asian="normal" style:font-name-complex="Times New Roman" style:font-size-complex="13.8999996185303pt" style:font-weight-complex="normal"/>
    </style:style>
    <style:style style:name="T3" style:family="text">
      <style:text-properties fo:color="#000000" loext:opacity="100%" style:font-name="Times New Roman" fo:font-size="13.8999996185303pt" fo:font-weight="bold" style:font-name-asian="Times New Roman" style:font-size-asian="13.8999996185303pt" style:font-weight-asian="bold" style:font-name-complex="Times New Roman" style:font-size-complex="13.8999996185303pt" style:font-weight-complex="bold"/>
    </style:style>
    <style:style style:name="T4" style:family="text">
      <style:text-properties fo:color="#000000" loext:opacity="100%" style:font-name="Times New Roman" fo:font-size="9.10000038146973pt" fo:font-weight="normal" style:font-name-asian="Times New Roman" style:font-size-asian="9.10000038146973pt" style:font-weight-asian="normal" style:font-name-complex="Times New Roman" style:font-size-complex="9.10000038146973pt" style:font-weight-complex="normal"/>
    </style:style>
    <style:style style:name="T5" style:family="text">
      <style:text-properties fo:color="#000000" loext:opacity="100%" style:font-name="Arial" fo:font-size="13.8999996185303pt" fo:font-weight="bold" style:font-name-asian="Arial" style:font-size-asian="13.8999996185303pt" style:font-weight-asian="bold" style:font-name-complex="Arial" style:font-size-complex="13.8999996185303pt" style:font-weight-complex="bold"/>
    </style:style>
    <style:style style:name="T6" style:family="text">
      <style:text-properties fo:color="#0f1115" loext:opacity="100%" style:font-name="Times New Roman" fo:font-size="13.8999996185303pt" fo:font-weight="normal" style:font-name-asian="Times New Roman" style:font-size-asian="13.8999996185303pt" style:font-weight-asian="normal" style:font-name-complex="Times New Roman" style:font-size-complex="13.8999996185303pt" style:font-weight-complex="normal"/>
    </style:style>
    <style:style style:name="T7" style:family="text">
      <style:text-properties fo:color="#0f1115" loext:opacity="100%" style:font-name="Segoe UI" fo:font-size="13.3999996185303pt" fo:font-weight="normal" style:font-name-asian="Segoe UI" style:font-size-asian="13.3999996185303pt" style:font-weight-asian="normal" style:font-name-complex="Segoe UI" style:font-size-complex="13.3999996185303pt" style:font-weight-complex="normal"/>
    </style:style>
    <style:style style:name="T8" style:family="text">
      <style:text-properties fo:color="#0f1115" loext:opacity="100%" style:font-name="Times New Roman" fo:font-size="13.8999996185303pt" fo:font-weight="bold" style:font-name-asian="Times New Roman" style:font-size-asian="13.8999996185303pt" style:font-weight-asian="bold" style:font-name-complex="Times New Roman" style:font-size-complex="13.8999996185303pt" style:font-weight-complex="bold"/>
    </style:style>
    <style:style style:name="T9" style:family="text">
      <style:text-properties fo:color="#0f1115" loext:opacity="100%" style:font-name="Arial" fo:font-size="13.8999996185303pt" fo:font-weight="bold" style:font-name-asian="Arial" style:font-size-asian="13.8999996185303pt" style:font-weight-asian="bold" style:font-name-complex="Arial" style:font-size-complex="13.8999996185303pt" style:font-weight-complex="bold"/>
    </style:style>
    <style:style style:name="T10" style:family="text">
      <style:text-properties fo:color="#0f1115" loext:opacity="100%" style:font-name="Arial" fo:font-size="13.8999996185303pt" fo:font-weight="normal" style:font-name-asian="Arial" style:font-size-asian="13.8999996185303pt" style:font-weight-asian="normal" style:font-name-complex="Arial" style:font-size-complex="13.8999996185303pt" style:font-weight-complex="normal"/>
    </style:style>
    <style:style style:name="T11" style:family="text">
      <style:text-properties fo:color="#0f1115" loext:opacity="100%" style:font-name="Times New Roman" fo:font-size="13.8999996185303pt" fo:font-style="italic" fo:font-weight="normal" style:font-name-asian="Times New Roman" style:font-size-asian="13.8999996185303pt" style:font-style-asian="italic" style:font-weight-asian="normal" style:font-name-complex="Times New Roman" style:font-size-complex="13.899999618530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651cm" svg:height="0.471cm" svg:x="2.177cm" svg:y="2.003cm">
          <draw:text-box>
            <text:p text:style-name="P1"><text:span text:style-name="T1">МИНИСТЕРСТВО НАУКИ И ВЫСШЕГО ОБРАЗОВАНИЯ РОССИЙСКОЙ ФЕДЕРАЦИИ</text:span></text:p>
          </draw:text-box>
        </draw:frame>
        <draw:frame draw:style-name="gr2" draw:text-style-name="P3" draw:layer="layout" svg:width="0.49cm" svg:height="0.543cm" svg:x="18.829cm" svg:y="1.94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3.096cm" svg:height="0.471cm" svg:x="4.006cm" svg:y="2.494cm">
          <draw:text-box>
            <text:p text:style-name="P1"><text:span text:style-name="T1">Федеральное государственное бюджетное образовательное учреждение </text:span></text:p>
          </draw:text-box>
        </draw:frame>
        <draw:frame draw:style-name="gr1" draw:text-style-name="P2" draw:layer="layout" svg:width="4.026cm" svg:height="0.471cm" svg:x="8.538cm" svg:y="2.976cm">
          <draw:text-box>
            <text:p text:style-name="P1"><text:span text:style-name="T1">высшего образования </text:span></text:p>
          </draw:text-box>
        </draw:frame>
        <draw:frame draw:style-name="gr2" draw:text-style-name="P3" draw:layer="layout" svg:width="13.28cm" svg:height="0.543cm" svg:x="3.888cm" svg:y="3.483cm">
          <draw:text-box>
            <text:p text:style-name="P1"><text:span text:style-name="T3">«КУБАНСКИЙ ГОСУДАРСТВЕННЫЙ УНИВЕРСИТЕТ» </text:span></text:p>
          </draw:text-box>
        </draw:frame>
        <draw:frame draw:style-name="gr2" draw:text-style-name="P3" draw:layer="layout" svg:width="5.219cm" svg:height="0.543cm" svg:x="7.937cm" svg:y="4.052cm">
          <draw:text-box>
            <text:p text:style-name="P1"><text:span text:style-name="T3">(ФГБОУ ВО «КубГУ») </text:span></text:p>
          </draw:text-box>
        </draw:frame>
        <draw:frame draw:style-name="gr2" draw:text-style-name="P3" draw:layer="layout" svg:width="14.71cm" svg:height="0.543cm" svg:x="3.1cm" svg:y="4.83cm">
          <draw:text-box>
            <text:p text:style-name="P1"><text:span text:style-name="T3">Факультет компьютерных технологий и прикладной математики</text:span></text:p>
          </draw:text-box>
        </draw:frame>
        <draw:frame draw:style-name="gr3" draw:text-style-name="P4" draw:layer="layout" svg:width="0.321cm" svg:height="0.357cm" svg:x="17.897cm" svg:y="4.98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728cm" svg:height="0.543cm" svg:x="6.107cm" svg:y="5.609cm">
          <draw:text-box>
            <text:p text:style-name="P1"><text:span text:style-name="T3">Кафедра информационных технологий</text:span></text:p>
          </draw:text-box>
        </draw:frame>
        <draw:frame draw:style-name="gr3" draw:text-style-name="P4" draw:layer="layout" svg:width="0.321cm" svg:height="0.357cm" svg:x="14.89cm" svg:y="5.7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21cm" svg:height="0.357cm" svg:x="10.503cm" svg:y="6.15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21cm" svg:height="0.357cm" svg:x="10.503cm" svg:y="6.52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21cm" svg:height="0.357cm" svg:x="10.503cm" svg:y="6.88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21cm" svg:height="0.357cm" svg:x="10.503cm" svg:y="7.25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21cm" svg:height="0.357cm" svg:x="10.503cm" svg:y="7.62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21cm" svg:height="0.357cm" svg:x="10.503cm" svg:y="7.98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21cm" svg:height="0.357cm" svg:x="10.503cm" svg:y="8.35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21cm" svg:height="0.357cm" svg:x="10.503cm" svg:y="8.71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0.22cm" svg:height="0.543cm" svg:x="5.42cm" svg:y="9.098cm">
          <draw:text-box>
            <text:p text:style-name="P1"><text:span text:style-name="T3">ОТЧЕТ ПО ЛАБОРАТОРНОЙ РАБОТЕ № 8 </text:span></text:p>
          </draw:text-box>
        </draw:frame>
        <draw:frame draw:style-name="gr2" draw:text-style-name="P3" draw:layer="layout" svg:width="3.433cm" svg:height="0.543cm" svg:x="8.834cm" svg:y="9.666cm">
          <draw:text-box>
            <text:p text:style-name="P1"><text:span text:style-name="T3">по дисциплине </text:span></text:p>
          </draw:text-box>
        </draw:frame>
        <draw:frame draw:style-name="gr2" draw:text-style-name="P3" draw:layer="layout" svg:width="6.015cm" svg:height="0.543cm" svg:x="7.479cm" svg:y="10.234cm">
          <draw:text-box>
            <text:p text:style-name="P1"><text:span text:style-name="T3"><text:s/>«Операционные системы»</text:span></text:p>
          </draw:text-box>
        </draw:frame>
        <draw:frame draw:style-name="gr3" draw:text-style-name="P4" draw:layer="layout" svg:width="0.321cm" svg:height="0.357cm" svg:x="13.526cm" svg:y="10.38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cm" svg:height="0.543cm" svg:x="10.503cm" svg:y="10.79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21cm" svg:height="0.357cm" svg:x="10.503cm" svg:y="11.3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cm" svg:height="0.543cm" svg:x="10.435cm" svg:y="11.72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21cm" svg:height="0.357cm" svg:x="10.562cm" svg:y="11.87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10.452cm" svg:y="12.29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21cm" svg:height="0.357cm" svg:x="10.554cm" svg:y="12.3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10.452cm" svg:y="12.775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21cm" svg:height="0.357cm" svg:x="10.554cm" svg:y="12.86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10.452cm" svg:y="13.267cm">
          <draw:text-box>
            <text:p text:style-name="P1"><text:span text:style-name="T1"><text:s/></text:span></text:p>
          </draw:text-box>
        </draw:frame>
        <draw:polygon draw:style-name="gr4" draw:text-style-name="P5" draw:layer="layout" svg:width="6.149cm" svg:height="0.567cm" svg:x="9.164cm" svg:y="13.745cm" svg:viewBox="0 0 6150 568" draw:points="0,0 6150,0 6150,568 0,568">
          <text:p/>
        </draw:polygon>
        <draw:frame draw:style-name="gr3" draw:text-style-name="P4" draw:layer="layout" svg:width="0.321cm" svg:height="0.357cm" svg:x="10.554cm" svg:y="13.35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7.128cm" svg:height="0.543cm" svg:x="1.999cm" svg:y="13.757cm">
          <draw:text-box>
            <text:p text:style-name="P1"><text:span text:style-name="T2">Выполнил студент группы ПМ23 </text:span></text:p>
          </draw:text-box>
        </draw:frame>
        <draw:frame draw:style-name="gr1" draw:text-style-name="P2" draw:layer="layout" svg:width="6.14cm" svg:height="0.471cm" svg:x="9.164cm" svg:y="13.817cm">
          <draw:text-box>
            <text:p text:style-name="P1"><text:span text:style-name="T1"><text:s text:c="58"/></text:span></text:p>
          </draw:text-box>
        </draw:frame>
        <draw:frame draw:style-name="gr2" draw:text-style-name="P3" draw:layer="layout" svg:width="2.622cm" svg:height="0.543cm" svg:x="15.314cm" svg:y="13.757cm">
          <draw:text-box>
            <text:p text:style-name="P1"><text:span text:style-name="T2">Е. Е. Шопин</text:span></text:p>
          </draw:text-box>
        </draw:frame>
        <draw:polygon draw:style-name="gr5" draw:text-style-name="P6" draw:layer="layout" svg:width="5.827cm" svg:height="0.017cm" svg:x="9.164cm" svg:y="14.236cm" svg:viewBox="0 0 5828 18" draw:points="0,0 5828,0 5828,18 0,18">
          <text:p/>
        </draw:polygon>
        <draw:frame draw:style-name="gr3" draw:text-style-name="P4" draw:layer="layout" svg:width="0.321cm" svg:height="0.357cm" svg:x="18.371cm" svg:y="13.90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cm" svg:height="0.543cm" svg:x="0.999cm" svg:y="14.32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21cm" svg:height="0.357cm" svg:x="1.127cm" svg:y="14.47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5.721cm" svg:height="0.543cm" svg:x="1.999cm" svg:y="14.891cm">
          <draw:text-box>
            <text:p text:style-name="P1"><text:span text:style-name="T2">Направление подготовки 01.03.02 Прикладная математика и информатика </text:span></text:p>
          </draw:text-box>
        </draw:frame>
        <draw:polygon draw:style-name="gr5" draw:text-style-name="P6" draw:layer="layout" svg:width="10.275cm" svg:height="0.026cm" svg:x="7.41cm" svg:y="15.379cm" svg:viewBox="0 0 10276 27" draw:points="0,0 10276,0 10276,27 0,27">
          <text:p/>
        </draw:polygon>
        <draw:frame draw:style-name="gr3" draw:text-style-name="P4" draw:layer="layout" svg:width="0.321cm" svg:height="0.357cm" svg:x="17.812cm" svg:y="15.04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217cm" svg:height="0.543cm" svg:x="1.999cm" svg:y="15.459cm">
          <draw:text-box>
            <text:p text:style-name="P1"><text:span text:style-name="T2">Курс <text:s text:c="3"/>2   <text:s/></text:span></text:p>
          </draw:text-box>
        </draw:frame>
        <draw:polygon draw:style-name="gr5" draw:text-style-name="P6" draw:layer="layout" svg:width="0.382cm" svg:height="0.026cm" svg:x="3.158cm" svg:y="15.946cm" svg:viewBox="0 0 383 27" draw:points="0,0 383,0 383,27 0,27">
          <text:p/>
        </draw:polygon>
        <draw:polygon draw:style-name="gr5" draw:text-style-name="P6" draw:layer="layout" svg:width="0.246cm" svg:height="0.026cm" svg:x="3.54cm" svg:y="15.946cm" svg:viewBox="0 0 247 27" draw:points="0,0 247,0 247,27 0,27">
          <text:p/>
        </draw:polygon>
        <draw:polygon draw:style-name="gr5" draw:text-style-name="P6" draw:layer="layout" svg:width="0.322cm" svg:height="0.026cm" svg:x="3.786cm" svg:y="15.946cm" svg:viewBox="0 0 323 27" draw:points="0,0 323,0 323,27 0,27">
          <text:p/>
        </draw:polygon>
        <draw:frame draw:style-name="gr3" draw:text-style-name="P4" draw:layer="layout" svg:width="0.321cm" svg:height="0.357cm" svg:x="4.227cm" svg:y="15.6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cm" svg:height="0.543cm" svg:x="0.999cm" svg:y="16.02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21cm" svg:height="0.357cm" svg:x="1.127cm" svg:y="16.17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cm" svg:height="0.543cm" svg:x="0.999cm" svg:y="16.59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21cm" svg:height="0.357cm" svg:x="1.127cm" svg:y="16.745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5.836cm" svg:height="0.567cm" svg:x="9.02cm" svg:y="17.725cm" svg:viewBox="0 0 5837 568" draw:points="0,0 5837,0 5837,568 0,568">
          <text:p/>
        </draw:polygon>
        <draw:frame draw:style-name="gr2" draw:text-style-name="P3" draw:layer="layout" svg:width="1.844cm" svg:height="0.543cm" svg:x="1.999cm" svg:y="17.161cm">
          <draw:text-box>
            <text:p text:style-name="P1"><text:span text:style-name="T2">Принял, </text:span></text:p>
          </draw:text-box>
        </draw:frame>
        <draw:frame draw:style-name="gr2" draw:text-style-name="P3" draw:layer="layout" svg:width="6.987cm" svg:height="0.543cm" svg:x="1.999cm" svg:y="17.737cm">
          <draw:text-box>
            <text:p text:style-name="P1"><text:span text:style-name="T2">канд. техн. наук, доцент каф. ИТ </text:span></text:p>
          </draw:text-box>
        </draw:frame>
        <draw:frame draw:style-name="gr1" draw:text-style-name="P2" draw:layer="layout" svg:width="5.823cm" svg:height="0.471cm" svg:x="9.021cm" svg:y="17.797cm">
          <draw:text-box>
            <text:p text:style-name="P1"><text:span text:style-name="T1"><text:s text:c="55"/></text:span></text:p>
          </draw:text-box>
        </draw:frame>
        <draw:frame draw:style-name="gr2" draw:text-style-name="P3" draw:layer="layout" svg:width="3.514cm" svg:height="0.543cm" svg:x="14.857cm" svg:y="17.737cm">
          <draw:text-box>
            <text:p text:style-name="P1"><text:span text:style-name="T2">А.А. Полупанов </text:span></text:p>
          </draw:text-box>
        </draw:frame>
        <draw:polygon draw:style-name="gr5" draw:text-style-name="P6" draw:layer="layout" svg:width="5.514cm" svg:height="0.017cm" svg:x="9.02cm" svg:y="18.216cm" svg:viewBox="0 0 5515 18" draw:points="0,0 5515,0 5515,18 0,18">
          <text:p/>
        </draw:polygon>
        <draw:frame draw:style-name="gr3" draw:text-style-name="P4" draw:layer="layout" svg:width="0.321cm" svg:height="0.357cm" svg:x="18.379cm" svg:y="17.88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0.999cm" svg:y="18.297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21cm" svg:height="0.357cm" svg:x="1.102cm" svg:y="18.3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0.999cm" svg:y="18.77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21cm" svg:height="0.357cm" svg:x="1.102cm" svg:y="1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0.999cm" svg:y="19.27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21cm" svg:height="0.357cm" svg:x="1.102cm" svg:y="19.3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0.999cm" svg:y="19.75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21cm" svg:height="0.357cm" svg:x="1.102cm" svg:y="19.84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0.999cm" svg:y="20.245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21cm" svg:height="0.357cm" svg:x="1.102cm" svg:y="20.3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0.999cm" svg:y="20.72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21cm" svg:height="0.357cm" svg:x="1.102cm" svg:y="20.8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0.999cm" svg:y="21.21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21cm" svg:height="0.357cm" svg:x="1.102cm" svg:y="21.3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0.999cm" svg:y="21.70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21cm" svg:height="0.357cm" svg:x="1.102cm" svg:y="21.7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0.999cm" svg:y="22.19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21cm" svg:height="0.357cm" svg:x="1.102cm" svg:y="22.2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0.999cm" svg:y="22.676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0.321cm" svg:height="0.357cm" svg:x="0.999cm" svg:y="23.16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21cm" svg:height="0.357cm" svg:x="10.503cm" svg:y="23.52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233cm" svg:height="0.543cm" svg:x="9.376cm" svg:y="23.902cm">
          <draw:text-box>
            <text:p text:style-name="P1"><text:span text:style-name="T2">Краснодар</text:span></text:p>
          </draw:text-box>
        </draw:frame>
        <draw:frame draw:style-name="gr3" draw:text-style-name="P4" draw:layer="layout" svg:width="0.321cm" svg:height="0.357cm" svg:x="11.621cm" svg:y="24.05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107cm" svg:height="0.543cm" svg:x="10.003cm" svg:y="24.47cm">
          <draw:text-box>
            <text:p text:style-name="P1"><text:span text:style-name="T2">2026 </text:span></text:p>
          </draw:text-box>
        </draw:frame>
        <draw:frame draw:style-name="gr2" draw:text-style-name="P3" draw:layer="layout" svg:width="0.49cm" svg:height="0.543cm" svg:x="0.999cm" svg:y="25.03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25.8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9cm" svg:height="0.543cm" svg:x="2.998cm" svg:y="26.75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9cm" svg:height="0.543cm" svg:x="8.081cm" svg:y="26.757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30">
        <draw:frame draw:style-name="gr2" draw:text-style-name="P3" draw:layer="layout" svg:width="2.398cm" svg:height="0.543cm" svg:x="2.998cm" svg:y="2.018cm">
          <draw:text-box>
            <text:p text:style-name="P1"><text:span text:style-name="T3">Задание 1. </text:span></text:p>
          </draw:text-box>
        </draw:frame>
        <draw:frame draw:style-name="gr2" draw:text-style-name="P3" draw:layer="layout" svg:width="0.49cm" svg:height="0.543cm" svg:x="0.999cm" svg:y="2.874cm">
          <draw:text-box>
            <text:p text:style-name="P1"><text:span text:style-name="T3">1.</text:span></text:p>
          </draw:text-box>
        </draw:frame>
        <draw:frame draw:style-name="gr2" draw:text-style-name="P3" draw:layer="layout" svg:width="0.49cm" svg:height="0.552cm" svg:x="1.372cm" svg:y="2.867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9.143cm" svg:height="0.543cm" svg:x="1.753cm" svg:y="2.874cm">
          <draw:text-box>
            <text:p text:style-name="P1"><text:span text:style-name="T3">Создайте директорию tmp files в /etc/skel </text:span></text:p>
          </draw:text-box>
        </draw:frame>
        <draw:frame draw:style-name="gr2" draw:text-style-name="P3" draw:layer="layout" svg:width="0.49cm" svg:height="0.543cm" svg:x="19.566cm" svg:y="7.2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8.826cm" svg:height="0.543cm" svg:x="1.339cm" svg:y="7.718cm">
          <draw:text-box>
            <text:p text:style-name="P1"><text:span text:style-name="T2">Рисунок 1 – <text:s text:c="2"/>Создание папки tmp files в /etc/skel (команда mkdir и проверка ls -l /etc/skel) </text:span></text:p>
          </draw:text-box>
        </draw:frame>
        <draw:frame draw:style-name="gr2" draw:text-style-name="P3" draw:layer="layout" svg:width="0.49cm" svg:height="0.543cm" svg:x="10.748cm" svg:y="8.28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2.998cm" svg:y="9.1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9cm" svg:height="0.543cm" svg:x="0.974cm" svg:y="9.997cm">
          <draw:text-box>
            <text:p text:style-name="P1"><text:span text:style-name="T3">2.</text:span></text:p>
          </draw:text-box>
        </draw:frame>
        <draw:frame draw:style-name="gr2" draw:text-style-name="P3" draw:layer="layout" svg:width="0.49cm" svg:height="0.552cm" svg:x="1.347cm" svg:y="9.99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15.935cm" svg:height="0.543cm" svg:x="1.753cm" svg:y="9.997cm">
          <draw:text-box>
            <text:p text:style-name="P1"><text:span text:style-name="T3">Создайте <text:s/>нового пользователя (например, testuser), войдите под ним и </text:span></text:p>
          </draw:text-box>
        </draw:frame>
        <draw:frame draw:style-name="gr2" draw:text-style-name="P3" draw:layer="layout" svg:width="14.918cm" svg:height="0.543cm" svg:x="0.999cm" svg:y="10.564cm">
          <draw:text-box>
            <text:p text:style-name="P1"><text:span text:style-name="T3">убедитесь, что папка tmp files появилась в его домашнем каталоге </text:span></text:p>
          </draw:text-box>
        </draw:frame>
        <draw:frame draw:style-name="gr2" draw:text-style-name="P3" draw:layer="layout" svg:width="0.49cm" svg:height="0.543cm" svg:x="4.269cm" svg:y="11.123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5.022cm" svg:height="0.584cm" svg:x="4.582cm" svg:y="23.51cm" svg:viewBox="0 0 5023 585" draw:points="0,0 5023,0 5023,585 0,585">
          <text:p/>
        </draw:polygon>
        <draw:polygon draw:style-name="gr6" draw:text-style-name="P7" draw:layer="layout" svg:width="1.517cm" svg:height="0.584cm" svg:x="9.604cm" svg:y="23.51cm" svg:viewBox="0 0 1518 585" draw:points="0,0 1518,0 1518,585 0,585">
          <text:p/>
        </draw:polygon>
        <draw:polygon draw:style-name="gr4" draw:text-style-name="P5" draw:layer="layout" svg:width="4.312cm" svg:height="0.584cm" svg:x="11.12cm" svg:y="23.51cm" svg:viewBox="0 0 4313 585" draw:points="0,0 4313,0 4313,585 0,585">
          <text:p/>
        </draw:polygon>
        <draw:polygon draw:style-name="gr4" draw:text-style-name="P5" draw:layer="layout" svg:width="3.981cm" svg:height="0.584cm" svg:x="15.559cm" svg:y="23.51cm" svg:viewBox="0 0 3982 585" draw:points="0,0 3982,0 3982,585 0,585">
          <text:p/>
        </draw:polygon>
        <draw:frame draw:style-name="gr2" draw:text-style-name="P3" draw:layer="layout" svg:width="0.49cm" svg:height="0.543cm" svg:x="18.855cm" svg:y="23.09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9.421cm" svg:height="0.627cm" svg:x="1.042cm" svg:y="24.102cm" svg:viewBox="0 0 19422 628" draw:points="0,0 19422,0 19422,628 0,628">
          <text:p/>
        </draw:polygon>
        <draw:frame draw:style-name="gr2" draw:text-style-name="P3" draw:layer="layout" svg:width="17.596cm" svg:height="0.543cm" svg:x="1.965cm" svg:y="23.538cm">
          <draw:text-box>
            <text:p text:style-name="P1"><text:span text:style-name="T2">Рисунок 2 – </text:span><text:span text:style-name="T6">Создание пользователя testuser и установка пароля,</text:span><text:span text:style-name="T2"> </text:span><text:span text:style-name="T6">Вход под testuser и </text:span></text:p>
          </draw:text-box>
        </draw:frame>
        <draw:frame draw:style-name="gr2" draw:text-style-name="P3" draw:layer="layout" svg:width="10.984cm" svg:height="0.543cm" svg:x="1.042cm" svg:y="24.173cm">
          <draw:text-box>
            <text:p text:style-name="P1"><text:span text:style-name="T6">содержимое домашнего каталога с папкой tmp files, </text:span></text:p>
          </draw:text-box>
        </draw:frame>
        <draw:polygon draw:style-name="gr4" draw:text-style-name="P5" draw:layer="layout" svg:width="0.83cm" svg:height="0.627cm" svg:x="10.333cm" svg:y="24.738cm" svg:viewBox="0 0 831 628" draw:points="0,0 831,0 831,628 0,628">
          <text:p/>
        </draw:polygon>
        <draw:frame draw:style-name="gr7" draw:text-style-name="P8" draw:layer="layout" svg:width="8.467cm" svg:height="0.632cm" svg:x="12.095cm" svg:y="24.099cm">
          <draw:text-box>
            <text:p text:style-name="P1"><text:span text:style-name="T7"><text:s/>Создание файла test.txt внутри ~/tmp </text:span></text:p>
          </draw:text-box>
        </draw:frame>
        <draw:frame draw:style-name="gr7" draw:text-style-name="P8" draw:layer="layout" svg:width="0.829cm" svg:height="0.632cm" svg:x="10.334cm" svg:y="24.735cm">
          <draw:text-box>
            <text:p text:style-name="P1"><text:span text:style-name="T7">files</text:span></text:p>
          </draw:text-box>
        </draw:frame>
        <draw:frame draw:style-name="gr2" draw:text-style-name="P3" draw:layer="layout" svg:width="0.49cm" svg:height="0.543cm" svg:x="11.163cm" svg:y="24.809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17.574cm" svg:height="4.283cm" svg:x="1.99cm" svg:y="3.418cm">
          <draw:image xlink:href="Pictures/1000000000000281000000B19B103BC6.png" xlink:type="simple" xlink:show="embed" xlink:actuate="onLoad" draw:mime-type="image/png">
            <text:p/>
          </draw:image>
        </draw:frame>
        <draw:frame draw:style-name="gr8" draw:text-style-name="P9" draw:layer="layout" svg:width="16.148cm" svg:height="11.842cm" svg:x="2.704cm" svg:y="11.675cm">
          <draw:image xlink:href="Pictures/10000000000001D10000015592CD08ED.png" xlink:type="simple" xlink:show="embed" xlink:actuate="onLoad" draw:mime-type="image/png">
            <text:p/>
          </draw:image>
        </draw:frame>
        <draw:frame draw:style-name="gr2" draw:text-style-name="P3" draw:layer="layout" svg:width="15.344cm" svg:height="0.543cm" svg:x="0.999cm" svg:y="25.664cm">
          <draw:text-box>
            <text:p text:style-name="P1"><text:span text:style-name="T3">3. <text:s text:c="2"/>Добавьте команду очистки в ~/.bash_logout пользователя testuser </text:span></text:p>
          </draw:text-box>
        </draw:frame>
      </draw:page>
      <draw:page draw:name="page3" draw:style-name="dp1" draw:master-page-name="master-page43">
        <draw:frame draw:style-name="gr2" draw:text-style-name="P3" draw:layer="layout" svg:width="0.49cm" svg:height="0.543cm" svg:x="19.058cm" svg:y="7.26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733cm" svg:height="0.543cm" svg:x="3.651cm" svg:y="7.998cm">
          <draw:text-box>
            <text:p text:style-name="P1"><text:span text:style-name="T2">Рисунок 3 – Содержимое файла .bash_logout с командой очистки </text:span></text:p>
          </draw:text-box>
        </draw:frame>
        <draw:frame draw:style-name="gr2" draw:text-style-name="P3" draw:layer="layout" svg:width="0.49cm" svg:height="0.543cm" svg:x="18.498cm" svg:y="11.8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936cm" svg:height="0.543cm" svg:x="3.558cm" svg:y="12.554cm">
          <draw:text-box>
            <text:p text:style-name="P1"><text:span text:style-name="T2">Рисунок 4 – Проверка отсутствия файлов после повторного входа </text:span></text:p>
          </draw:text-box>
        </draw:frame>
        <draw:frame draw:style-name="gr2" draw:text-style-name="P3" draw:layer="layout" svg:width="0.49cm" svg:height="0.543cm" svg:x="0.999cm" svg:y="13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398cm" svg:height="0.543cm" svg:x="0.999cm" svg:y="14.265cm">
          <draw:text-box>
            <text:p text:style-name="P1"><text:span text:style-name="T3">Задание 2. </text:span></text:p>
          </draw:text-box>
        </draw:frame>
        <draw:frame draw:style-name="gr2" draw:text-style-name="P3" draw:layer="layout" svg:width="13cm" svg:height="0.543cm" svg:x="0.999cm" svg:y="15.111cm">
          <draw:text-box>
            <text:p text:style-name="P1"><text:span text:style-name="T3">1. <text:s/>Создайте директорию my programm в домашней папке </text:span></text:p>
          </draw:text-box>
        </draw:frame>
        <draw:frame draw:style-name="gr2" draw:text-style-name="P3" draw:layer="layout" svg:width="0.49cm" svg:height="0.543cm" svg:x="16.508cm" svg:y="17.24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3.588cm" svg:height="0.543cm" svg:x="3.727cm" svg:y="17.695cm">
          <draw:text-box>
            <text:p text:style-name="P1"><text:span text:style-name="T2">Рисунок 5 – Создание папки my programm в домашнем каталоге </text:span></text:p>
          </draw:text-box>
        </draw:frame>
        <draw:frame draw:style-name="gr2" draw:text-style-name="P3" draw:layer="layout" svg:width="9.186cm" svg:height="0.543cm" svg:x="0.999cm" svg:y="18.558cm">
          <draw:text-box>
            <text:p text:style-name="P1"><text:span text:style-name="T3">2. <text:s/>Добавьте путь в PATH через ~/.bashrc </text:span></text:p>
          </draw:text-box>
        </draw:frame>
        <draw:frame draw:style-name="gr2" draw:text-style-name="P3" draw:layer="layout" svg:width="0.49cm" svg:height="0.543cm" svg:x="18.252cm" svg:y="26.333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17.05cm" svg:height="5.698cm" svg:x="2.001cm" svg:y="2cm">
          <draw:image xlink:href="Pictures/10000000000002E3000000F7A662C253.png" xlink:type="simple" xlink:show="embed" xlink:actuate="onLoad" draw:mime-type="image/png">
            <text:p/>
          </draw:image>
        </draw:frame>
        <draw:frame draw:style-name="gr8" draw:text-style-name="P9" draw:layer="layout" svg:width="15.936cm" svg:height="3.424cm" svg:x="2.559cm" svg:y="8.832cm">
          <draw:image xlink:href="Pictures/10000000000002250000007606F9F9A2.png" xlink:type="simple" xlink:show="embed" xlink:actuate="onLoad" draw:mime-type="image/png">
            <text:p/>
          </draw:image>
        </draw:frame>
        <draw:frame draw:style-name="gr8" draw:text-style-name="P9" draw:layer="layout" svg:width="11.937cm" svg:height="1.74cm" svg:x="4.548cm" svg:y="15.94cm">
          <draw:image xlink:href="Pictures/100000000000015000000031995FEC7C.png" xlink:type="simple" xlink:show="embed" xlink:actuate="onLoad" draw:mime-type="image/png">
            <text:p/>
          </draw:image>
        </draw:frame>
        <draw:frame draw:style-name="gr8" draw:text-style-name="P9" draw:layer="layout" svg:width="15.451cm" svg:height="7.382cm" svg:x="2.802cm" svg:y="19.381cm">
          <draw:image xlink:href="Pictures/1000000000000423000001FAB39D2242.png" xlink:type="simple" xlink:show="embed" xlink:actuate="onLoad" draw:mime-type="image/png">
            <text:p/>
          </draw:image>
        </draw:frame>
        <draw:frame draw:style-name="gr2" draw:text-style-name="P3" draw:layer="layout" svg:width="9.23cm" svg:height="0.543cm" svg:x="5.921cm" svg:y="26.782cm">
          <draw:text-box>
            <text:p text:style-name="P1"><text:span text:style-name="T2">Рисунок 6 – Добавленная строка в ~/.bashrc </text:span></text:p>
          </draw:text-box>
        </draw:frame>
      </draw:page>
      <draw:page draw:name="page4" draw:style-name="dp1" draw:master-page-name="master-page46">
        <draw:frame draw:style-name="gr2" draw:text-style-name="P3" draw:layer="layout" svg:width="0.49cm" svg:height="0.543cm" svg:x="10.503cm" svg:y="4.76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11cm" svg:height="0.543cm" svg:x="4.472cm" svg:y="5.33cm">
          <draw:text-box>
            <text:p text:style-name="P1"><text:span text:style-name="T2">Рисунок 7 – Вывод $PATH после применения изменений </text:span></text:p>
          </draw:text-box>
        </draw:frame>
        <draw:frame draw:style-name="gr2" draw:text-style-name="P3" draw:layer="layout" svg:width="2.398cm" svg:height="0.543cm" svg:x="0.999cm" svg:y="6.185cm">
          <draw:text-box>
            <text:p text:style-name="P1"><text:span text:style-name="T3">Задание 3. </text:span></text:p>
          </draw:text-box>
        </draw:frame>
        <draw:frame draw:style-name="gr2" draw:text-style-name="P3" draw:layer="layout" svg:width="0.49cm" svg:height="0.543cm" svg:x="0.999cm" svg:y="7.041cm">
          <draw:text-box>
            <text:p text:style-name="P1"><text:span text:style-name="T3">1.</text:span></text:p>
          </draw:text-box>
        </draw:frame>
        <draw:frame draw:style-name="gr2" draw:text-style-name="P3" draw:layer="layout" svg:width="0.49cm" svg:height="0.552cm" svg:x="1.372cm" svg:y="7.03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12.912cm" svg:height="0.543cm" svg:x="1.635cm" svg:y="7.041cm">
          <draw:text-box>
            <text:p text:style-name="P1"><text:span text:style-name="T3">Установите переменную HISTTIMEFORMAT глобально <text:s/></text:span></text:p>
          </draw:text-box>
        </draw:frame>
        <draw:frame draw:style-name="gr2" draw:text-style-name="P3" draw:layer="layout" svg:width="0.49cm" svg:height="0.543cm" svg:x="1.635cm" svg:y="7.608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6.242cm" svg:height="0.585cm" svg:x="9.003cm" svg:y="15.684cm" svg:viewBox="0 0 6243 586" draw:points="0,0 6243,0 6243,586 0,586">
          <text:p/>
        </draw:polygon>
        <draw:frame draw:style-name="gr2" draw:text-style-name="P3" draw:layer="layout" svg:width="0.49cm" svg:height="0.543cm" svg:x="19.794cm" svg:y="15.2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8.932cm" svg:height="0.543cm" svg:x="6.386cm" svg:y="15.713cm">
          <draw:text-box>
            <text:p text:style-name="P1"><text:span text:style-name="T2">Рисунок 8 – </text:span><text:span text:style-name="T6">В конец файл добавил строку</text:span><text:span text:style-name="T3"> </text:span></text:p>
          </draw:text-box>
        </draw:frame>
        <draw:frame draw:style-name="gr2" draw:text-style-name="P3" draw:layer="layout" svg:width="0.49cm" svg:height="0.543cm" svg:x="10.503cm" svg:y="16.56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9cm" svg:height="0.543cm" svg:x="10.503cm" svg:y="17.12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17.991cm">
          <draw:text-box>
            <text:p text:style-name="P1"><text:span text:style-name="T3">2.</text:span></text:p>
          </draw:text-box>
        </draw:frame>
        <draw:frame draw:style-name="gr2" draw:text-style-name="P3" draw:layer="layout" svg:width="0.49cm" svg:height="0.552cm" svg:x="1.372cm" svg:y="17.98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9.031cm" svg:height="0.543cm" svg:x="1.635cm" svg:y="17.991cm">
          <draw:text-box>
            <text:p text:style-name="P1"><text:span text:style-name="T3"><text:s/>Проверьте работу HISTTIMEFORMAT </text:span></text:p>
          </draw:text-box>
        </draw:frame>
        <draw:frame draw:style-name="gr2" draw:text-style-name="P3" draw:layer="layout" svg:width="0.49cm" svg:height="0.543cm" svg:x="10.503cm" svg:y="22.7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2.593cm" svg:height="0.543cm" svg:x="4.227cm" svg:y="23.267cm">
          <draw:text-box>
            <text:p text:style-name="P1"><text:span text:style-name="T2">Рисунок 9 – Вывод команды history с временными метками </text:span></text:p>
          </draw:text-box>
        </draw:frame>
        <draw:frame draw:style-name="gr2" draw:text-style-name="P3" draw:layer="layout" svg:width="0.49cm" svg:height="0.543cm" svg:x="0.999cm" svg:y="24.1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9cm" svg:height="0.543cm" svg:x="0.999cm" svg:y="24.97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9cm" svg:height="0.543cm" svg:x="0.999cm" svg:y="25.825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19.917cm" svg:height="2.745cm" svg:x="1.053cm" svg:y="2cm">
          <draw:image xlink:href="Pictures/10000000000002CE000000630AB521F4.png" xlink:type="simple" xlink:show="embed" xlink:actuate="onLoad" draw:mime-type="image/png">
            <text:p/>
          </draw:image>
        </draw:frame>
        <draw:frame draw:style-name="gr8" draw:text-style-name="P9" draw:layer="layout" svg:width="18.521cm" svg:height="7.545cm" svg:x="1.266cm" svg:y="8.151cm">
          <draw:image xlink:href="Pictures/100000000000041D000001AD75AF32EC.png" xlink:type="simple" xlink:show="embed" xlink:actuate="onLoad" draw:mime-type="image/png">
            <text:p/>
          </draw:image>
        </draw:frame>
        <draw:frame draw:style-name="gr8" draw:text-style-name="P9" draw:layer="layout" svg:width="19.24cm" svg:height="3.867cm" svg:x="1.053cm" svg:y="18.815cm">
          <draw:image xlink:href="Pictures/10000000000005440000010F8E07E272.png" xlink:type="simple" xlink:show="embed" xlink:actuate="onLoad" draw:mime-type="image/png">
            <text:p/>
          </draw:image>
        </draw:frame>
        <draw:frame draw:style-name="gr2" draw:text-style-name="P3" draw:layer="layout" svg:width="0.49cm" svg:height="0.543cm" svg:x="0.999cm" svg:y="26.68cm">
          <draw:text-box>
            <text:p text:style-name="P1"><text:span text:style-name="T3"><text:s/></text:span></text:p>
          </draw:text-box>
        </draw:frame>
      </draw:page>
      <draw:page draw:name="page5" draw:style-name="dp1" draw:master-page-name="master-page30">
        <draw:polygon draw:style-name="gr4" draw:text-style-name="P5" draw:layer="layout" svg:width="19.108cm" svg:height="0.821cm" svg:x="0.948cm" svg:y="2.007cm" svg:viewBox="0 0 19109 822" draw:points="0,0 19109,0 19109,822 0,822">
          <text:p/>
        </draw:polygon>
        <draw:frame draw:style-name="gr2" draw:text-style-name="P3" draw:layer="layout" svg:width="0.49cm" svg:height="0.543cm" svg:x="0.999cm" svg:y="2.281cm">
          <draw:text-box>
            <text:p text:style-name="P1"><text:span text:style-name="T8">3.</text:span></text:p>
          </draw:text-box>
        </draw:frame>
        <draw:frame draw:style-name="gr2" draw:text-style-name="P3" draw:layer="layout" svg:width="0.49cm" svg:height="0.552cm" svg:x="1.372cm" svg:y="2.274cm">
          <draw:text-box>
            <text:p text:style-name="P1"><text:span text:style-name="T9"><text:s/></text:span></text:p>
          </draw:text-box>
        </draw:frame>
        <draw:polygon draw:style-name="gr4" draw:text-style-name="P5" draw:layer="layout" svg:width="19.108cm" svg:height="0.821cm" svg:x="0.948cm" svg:y="2.828cm" svg:viewBox="0 0 19109 822" draw:points="0,0 19109,0 19109,822 0,822">
          <text:p/>
        </draw:polygon>
        <draw:frame draw:style-name="gr2" draw:text-style-name="P3" draw:layer="layout" svg:width="15.821cm" svg:height="0.543cm" svg:x="1.635cm" svg:y="2.281cm">
          <draw:text-box>
            <text:p text:style-name="P1"><text:span text:style-name="T8">Создайте файл ~/.bash_aliases и добавьте псевдоним для rm с запросом </text:span></text:p>
          </draw:text-box>
        </draw:frame>
        <draw:frame draw:style-name="gr2" draw:text-style-name="P3" draw:layer="layout" svg:width="3.553cm" svg:height="0.543cm" svg:x="1.635cm" svg:y="3.111cm">
          <draw:text-box>
            <text:p text:style-name="P1"><text:span text:style-name="T8">подтверждения </text:span></text:p>
          </draw:text-box>
        </draw:frame>
        <draw:frame draw:style-name="gr2" draw:text-style-name="P3" draw:layer="layout" svg:width="0.49cm" svg:height="0.543cm" svg:x="16.296cm" svg:y="7.14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0.474cm" svg:height="0.543cm" svg:x="5.293cm" svg:y="7.6cm">
          <draw:text-box>
            <text:p text:style-name="P1"><text:span text:style-name="T2">Рисунок 10 – Файл ~/.bash_aliases с псевдонимом </text:span></text:p>
          </draw:text-box>
        </draw:frame>
        <draw:frame draw:style-name="gr2" draw:text-style-name="P3" draw:layer="layout" svg:width="0.49cm" svg:height="0.543cm" svg:x="19.947cm" svg:y="12.0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3.998cm" svg:height="0.543cm" svg:x="3.524cm" svg:y="12.461cm">
          <draw:text-box>
            <text:p text:style-name="P1"><text:span text:style-name="T2">Рисунок 11 – Проверка псевдонима rm с запросом подтверждения </text:span></text:p>
          </draw:text-box>
        </draw:frame>
        <draw:frame draw:style-name="gr2" draw:text-style-name="P3" draw:layer="layout" svg:width="0.49cm" svg:height="0.543cm" svg:x="10.503cm" svg:y="13.3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10.503cm" svg:y="14.16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15.01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15.8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16.71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17.5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18.41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2.998cm" svg:y="19.2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2.998cm" svg:y="20.1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2.998cm" svg:y="20.97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2.998cm" svg:y="21.8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2.998cm" svg:y="22.6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2.998cm" svg:y="23.52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2.998cm" svg:y="24.3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2.998cm" svg:y="25.22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2.998cm" svg:y="26.071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11.517cm" svg:height="3.454cm" svg:x="4.76cm" svg:y="4.128cm">
          <draw:image xlink:href="Pictures/10000000000000C80000003C6F311EEC.png" xlink:type="simple" xlink:show="embed" xlink:actuate="onLoad" draw:mime-type="image/png">
            <text:p/>
          </draw:image>
        </draw:frame>
        <draw:frame draw:style-name="gr8" draw:text-style-name="P9" draw:layer="layout" svg:width="18.819cm" svg:height="4.015cm" svg:x="1.109cm" svg:y="8.433cm">
          <draw:image xlink:href="Pictures/10000000000001EC00000069B953953C.png" xlink:type="simple" xlink:show="embed" xlink:actuate="onLoad" draw:mime-type="image/png">
            <text:p/>
          </draw:image>
        </draw:frame>
        <draw:frame draw:style-name="gr2" draw:text-style-name="P3" draw:layer="layout" svg:width="0.49cm" svg:height="0.543cm" svg:x="2.998cm" svg:y="26.917cm">
          <draw:text-box>
            <text:p text:style-name="P1"><text:span text:style-name="T2"><text:s/></text:span></text:p>
          </draw:text-box>
        </draw:frame>
      </draw:page>
      <draw:page draw:name="page6" draw:style-name="dp1" draw:master-page-name="master-page30">
        <draw:polygon draw:style-name="gr4" draw:text-style-name="P5" draw:layer="layout" svg:width="17.744cm" svg:height="0.575cm" svg:x="2.312cm" svg:y="3.057cm" svg:viewBox="0 0 17745 576" draw:points="0,0 17745,0 17745,576 0,576">
          <text:p/>
        </draw:polygon>
        <draw:frame draw:style-name="gr2" draw:text-style-name="P3" draw:layer="layout" svg:width="2.101cm" svg:height="0.543cm" svg:x="1.999cm" svg:y="2.018cm">
          <draw:text-box>
            <text:p text:style-name="P1"><text:span text:style-name="T3">Вопросы </text:span></text:p>
          </draw:text-box>
        </draw:frame>
        <draw:frame draw:style-name="gr2" draw:text-style-name="P3" draw:layer="layout" svg:width="0.49cm" svg:height="0.543cm" svg:x="2.363cm" svg:y="3.077cm">
          <draw:text-box>
            <text:p text:style-name="P1"><text:span text:style-name="T6">1.</text:span></text:p>
          </draw:text-box>
        </draw:frame>
        <draw:frame draw:style-name="gr2" draw:text-style-name="P3" draw:layer="layout" svg:width="0.49cm" svg:height="0.552cm" svg:x="2.736cm" svg:y="3.07cm">
          <draw:text-box>
            <text:p text:style-name="P1"><text:span text:style-name="T10"><text:s/></text:span></text:p>
          </draw:text-box>
        </draw:frame>
        <draw:polygon draw:style-name="gr4" draw:text-style-name="P5" draw:layer="layout" svg:width="17.744cm" svg:height="0.568cm" svg:x="2.312cm" svg:y="3.632cm" svg:viewBox="0 0 17745 569" draw:points="0,0 17745,0 17745,569 0,569">
          <text:p/>
        </draw:polygon>
        <draw:frame draw:style-name="gr2" draw:text-style-name="P3" draw:layer="layout" svg:width="16.253cm" svg:height="0.543cm" svg:x="2.998cm" svg:y="3.077cm">
          <draw:text-box>
            <text:p text:style-name="P1"><text:span text:style-name="T8">Как называется файл в Astra Linux, в котором определяются настройки </text:span></text:p>
          </draw:text-box>
        </draw:frame>
        <draw:polygon draw:style-name="gr4" draw:text-style-name="P5" draw:layer="layout" svg:width="17.744cm" svg:height="0.568cm" svg:x="2.312cm" svg:y="4.2cm" svg:viewBox="0 0 17745 569" draw:points="0,0 17745,0 17745,569 0,569">
          <text:p/>
        </draw:polygon>
        <draw:polygon draw:style-name="gr6" draw:text-style-name="P7" draw:layer="layout" svg:width="1.839cm" svg:height="0.585cm" svg:x="17.591cm" svg:y="4.183cm" svg:viewBox="0 0 1840 586" draw:points="0,0 1840,0 1840,586 0,586">
          <text:p/>
        </draw:polygon>
        <draw:frame draw:style-name="gr2" draw:text-style-name="P3" draw:layer="layout" svg:width="9.822cm" svg:height="0.543cm" svg:x="2.998cm" svg:y="3.653cm">
          <draw:text-box>
            <text:p text:style-name="P1"><text:span text:style-name="T8">окружения для конкретного пользователя? </text:span></text:p>
          </draw:text-box>
        </draw:frame>
        <draw:polygon draw:style-name="gr4" draw:text-style-name="P5" draw:layer="layout" svg:width="17.744cm" svg:height="0.567cm" svg:x="2.312cm" svg:y="4.768cm" svg:viewBox="0 0 17745 568" draw:points="0,0 17745,0 17745,568 0,568">
          <text:p/>
        </draw:polygon>
        <draw:polygon draw:style-name="gr6" draw:text-style-name="P7" draw:layer="layout" svg:width="1.812cm" svg:height="0.584cm" svg:x="13.526cm" svg:y="4.751cm" svg:viewBox="0 0 1813 585" draw:points="0,0 1813,0 1813,585 0,585">
          <text:p/>
        </draw:polygon>
        <draw:frame draw:style-name="gr2" draw:text-style-name="P3" draw:layer="layout" svg:width="16.592cm" svg:height="0.543cm" svg:x="2.998cm" svg:y="4.212cm">
          <draw:text-box>
            <text:p text:style-name="P1"><text:span text:style-name="T11">Ответ: </text:span><text:span text:style-name="T6">Для интерактивного входа с аутентификацией используется ~/.profile, </text:span></text:p>
          </draw:text-box>
        </draw:frame>
        <draw:polygon draw:style-name="gr4" draw:text-style-name="P5" draw:layer="layout" svg:width="17.744cm" svg:height="0.568cm" svg:x="2.312cm" svg:y="5.335cm" svg:viewBox="0 0 17745 569" draw:points="0,0 17745,0 17745,569 0,569">
          <text:p/>
        </draw:polygon>
        <draw:frame draw:style-name="gr2" draw:text-style-name="P3" draw:layer="layout" svg:width="16.458cm" svg:height="0.543cm" svg:x="2.998cm" svg:y="4.78cm">
          <draw:text-box>
            <text:p text:style-name="P1"><text:span text:style-name="T6">для интерактивной работы без аутентификации – ~/.bashrc. Оба файла служат </text:span></text:p>
          </draw:text-box>
        </draw:frame>
        <draw:polygon draw:style-name="gr4" draw:text-style-name="P5" draw:layer="layout" svg:width="17.744cm" svg:height="0.567cm" svg:x="2.312cm" svg:y="5.903cm" svg:viewBox="0 0 17745 568" draw:points="0,0 17745,0 17745,568 0,568">
          <text:p/>
        </draw:polygon>
        <draw:frame draw:style-name="gr2" draw:text-style-name="P3" draw:layer="layout" svg:width="13.411cm" svg:height="0.543cm" svg:x="2.998cm" svg:y="5.347cm">
          <draw:text-box>
            <text:p text:style-name="P1"><text:span text:style-name="T6">для настройки окружения конкретного пользователя (стр. 5, 8). </text:span></text:p>
          </draw:text-box>
        </draw:frame>
        <draw:frame draw:style-name="gr2" draw:text-style-name="P3" draw:layer="layout" svg:width="0.49cm" svg:height="0.543cm" svg:x="2.363cm" svg:y="5.923cm">
          <draw:text-box>
            <text:p text:style-name="P1"><text:span text:style-name="T6">2.</text:span></text:p>
          </draw:text-box>
        </draw:frame>
        <draw:frame draw:style-name="gr2" draw:text-style-name="P3" draw:layer="layout" svg:width="0.49cm" svg:height="0.552cm" svg:x="2.736cm" svg:y="5.916cm">
          <draw:text-box>
            <text:p text:style-name="P1"><text:span text:style-name="T10"><text:s/></text:span></text:p>
          </draw:text-box>
        </draw:frame>
        <draw:polygon draw:style-name="gr4" draw:text-style-name="P5" draw:layer="layout" svg:width="17.744cm" svg:height="0.567cm" svg:x="2.312cm" svg:y="6.47cm" svg:viewBox="0 0 17745 568" draw:points="0,0 17745,0 17745,568 0,568">
          <text:p/>
        </draw:polygon>
        <draw:frame draw:style-name="gr2" draw:text-style-name="P3" draw:layer="layout" svg:width="15.332cm" svg:height="0.543cm" svg:x="2.998cm" svg:y="5.923cm">
          <draw:text-box>
            <text:p text:style-name="P1"><text:span text:style-name="T8">В каком файле определяется переменная окружения PATH для всех </text:span></text:p>
          </draw:text-box>
        </draw:frame>
        <draw:polygon draw:style-name="gr4" draw:text-style-name="P5" draw:layer="layout" svg:width="17.744cm" svg:height="0.568cm" svg:x="2.312cm" svg:y="7.037cm" svg:viewBox="0 0 17745 569" draw:points="0,0 17745,0 17745,569 0,569">
          <text:p/>
        </draw:polygon>
        <draw:polygon draw:style-name="gr6" draw:text-style-name="P7" draw:layer="layout" svg:width="2.168cm" svg:height="0.585cm" svg:x="5.234cm" svg:y="7.02cm" svg:viewBox="0 0 2169 586" draw:points="0,0 2169,0 2169,586 0,586">
          <text:p/>
        </draw:polygon>
        <draw:polygon draw:style-name="gr6" draw:text-style-name="P7" draw:layer="layout" svg:width="2.678cm" svg:height="0.585cm" svg:x="16.151cm" svg:y="7.02cm" svg:viewBox="0 0 2679 586" draw:points="0,0 2679,0 2679,586 0,586">
          <text:p/>
        </draw:polygon>
        <draw:frame draw:style-name="gr2" draw:text-style-name="P3" draw:layer="layout" svg:width="3.623cm" svg:height="0.543cm" svg:x="2.998cm" svg:y="6.49cm">
          <draw:text-box>
            <text:p text:style-name="P1"><text:span text:style-name="T8">пользователей? </text:span></text:p>
          </draw:text-box>
        </draw:frame>
        <draw:polygon draw:style-name="gr4" draw:text-style-name="P5" draw:layer="layout" svg:width="17.744cm" svg:height="0.567cm" svg:x="2.312cm" svg:y="7.605cm" svg:viewBox="0 0 17745 568" draw:points="0,0 17745,0 17745,568 0,568">
          <text:p/>
        </draw:polygon>
        <draw:frame draw:style-name="gr2" draw:text-style-name="P3" draw:layer="layout" svg:width="15.99cm" svg:height="0.543cm" svg:x="2.998cm" svg:y="7.049cm">
          <draw:text-box>
            <text:p text:style-name="P1"><text:span text:style-name="T11">Ответ: </text:span><text:span text:style-name="T6">В /etc/profile (стр. 8). Также можно добавить файлы в /etc/profile.d/. </text:span></text:p>
          </draw:text-box>
        </draw:frame>
        <draw:frame draw:style-name="gr2" draw:text-style-name="P3" draw:layer="layout" svg:width="0.49cm" svg:height="0.543cm" svg:x="2.363cm" svg:y="7.625cm">
          <draw:text-box>
            <text:p text:style-name="P1"><text:span text:style-name="T6">3.</text:span></text:p>
          </draw:text-box>
        </draw:frame>
        <draw:frame draw:style-name="gr2" draw:text-style-name="P3" draw:layer="layout" svg:width="0.49cm" svg:height="0.552cm" svg:x="2.736cm" svg:y="7.618cm">
          <draw:text-box>
            <text:p text:style-name="P1"><text:span text:style-name="T10"><text:s/></text:span></text:p>
          </draw:text-box>
        </draw:frame>
        <draw:polygon draw:style-name="gr4" draw:text-style-name="P5" draw:layer="layout" svg:width="17.744cm" svg:height="0.568cm" svg:x="2.312cm" svg:y="8.172cm" svg:viewBox="0 0 17745 569" draw:points="0,0 17745,0 17745,569 0,569">
          <text:p/>
        </draw:polygon>
        <draw:frame draw:style-name="gr2" draw:text-style-name="P3" draw:layer="layout" svg:width="14.894cm" svg:height="0.543cm" svg:x="2.998cm" svg:y="7.625cm">
          <draw:text-box>
            <text:p text:style-name="P1"><text:span text:style-name="T8">В какой директории хранятся шаблоны файлов и директорий для </text:span></text:p>
          </draw:text-box>
        </draw:frame>
        <draw:polygon draw:style-name="gr4" draw:text-style-name="P5" draw:layer="layout" svg:width="17.744cm" svg:height="0.575cm" svg:x="2.312cm" svg:y="8.74cm" svg:viewBox="0 0 17745 576" draw:points="0,0 17745,0 17745,576 0,576">
          <text:p/>
        </draw:polygon>
        <draw:polygon draw:style-name="gr6" draw:text-style-name="P7" draw:layer="layout" svg:width="1.643cm" svg:height="0.584cm" svg:x="5.234cm" svg:y="8.723cm" svg:viewBox="0 0 1644 585" draw:points="0,0 1644,0 1644,585 0,585">
          <text:p/>
        </draw:polygon>
        <draw:frame draw:style-name="gr2" draw:text-style-name="P3" draw:layer="layout" svg:width="6.593cm" svg:height="0.543cm" svg:x="2.998cm" svg:y="8.192cm">
          <draw:text-box>
            <text:p text:style-name="P1"><text:span text:style-name="T8">создаваемых пользователей? </text:span></text:p>
          </draw:text-box>
        </draw:frame>
        <draw:polygon draw:style-name="gr4" draw:text-style-name="P5" draw:layer="layout" svg:width="17.744cm" svg:height="0.568cm" svg:x="2.312cm" svg:y="9.315cm" svg:viewBox="0 0 17745 569" draw:points="0,0 17745,0 17745,569 0,569">
          <text:p/>
        </draw:polygon>
        <draw:frame draw:style-name="gr2" draw:text-style-name="P3" draw:layer="layout" svg:width="5.734cm" svg:height="0.543cm" svg:x="2.998cm" svg:y="8.751cm">
          <draw:text-box>
            <text:p text:style-name="P1"><text:span text:style-name="T11">Ответ: </text:span><text:span text:style-name="T6">В /etc/skel (стр. 1). </text:span></text:p>
          </draw:text-box>
        </draw:frame>
        <draw:frame draw:style-name="gr2" draw:text-style-name="P3" draw:layer="layout" svg:width="0.49cm" svg:height="0.543cm" svg:x="2.363cm" svg:y="9.335cm">
          <draw:text-box>
            <text:p text:style-name="P1"><text:span text:style-name="T6">4.</text:span></text:p>
          </draw:text-box>
        </draw:frame>
        <draw:frame draw:style-name="gr2" draw:text-style-name="P3" draw:layer="layout" svg:width="0.49cm" svg:height="0.552cm" svg:x="2.736cm" svg:y="9.329cm">
          <draw:text-box>
            <text:p text:style-name="P1"><text:span text:style-name="T10"><text:s/></text:span></text:p>
          </draw:text-box>
        </draw:frame>
        <draw:polygon draw:style-name="gr4" draw:text-style-name="P5" draw:layer="layout" svg:width="17.744cm" svg:height="0.568cm" svg:x="2.312cm" svg:y="9.883cm" svg:viewBox="0 0 17745 569" draw:points="0,0 17745,0 17745,569 0,569">
          <text:p/>
        </draw:polygon>
        <draw:frame draw:style-name="gr2" draw:text-style-name="P3" draw:layer="layout" svg:width="16.916cm" svg:height="0.543cm" svg:x="2.998cm" svg:y="9.335cm">
          <draw:text-box>
            <text:p text:style-name="P1"><text:span text:style-name="T8">Если пользователь создает свою переменную окружения, в каком файле он </text:span></text:p>
          </draw:text-box>
        </draw:frame>
        <draw:polygon draw:style-name="gr4" draw:text-style-name="P5" draw:layer="layout" svg:width="17.744cm" svg:height="0.567cm" svg:x="2.312cm" svg:y="10.451cm" svg:viewBox="0 0 17745 568" draw:points="0,0 17745,0 17745,568 0,568">
          <text:p/>
        </draw:polygon>
        <draw:frame draw:style-name="gr2" draw:text-style-name="P3" draw:layer="layout" svg:width="4.992cm" svg:height="0.543cm" svg:x="2.998cm" svg:y="9.904cm">
          <draw:text-box>
            <text:p text:style-name="P1"><text:span text:style-name="T8">может ее определить? </text:span></text:p>
          </draw:text-box>
        </draw:frame>
        <draw:polygon draw:style-name="gr4" draw:text-style-name="P5" draw:layer="layout" svg:width="17.744cm" svg:height="0.567cm" svg:x="2.312cm" svg:y="11.018cm" svg:viewBox="0 0 17745 568" draw:points="0,0 17745,0 17745,568 0,568">
          <text:p/>
        </draw:polygon>
        <draw:polygon draw:style-name="gr6" draw:text-style-name="P7" draw:layer="layout" svg:width="1.838cm" svg:height="0.584cm" svg:x="4.633cm" svg:y="11.001cm" svg:viewBox="0 0 1839 585" draw:points="0,0 1839,0 1839,585 0,585">
          <text:p/>
        </draw:polygon>
        <draw:polygon draw:style-name="gr6" draw:text-style-name="P7" draw:layer="layout" svg:width="1.812cm" svg:height="0.584cm" svg:x="6.725cm" svg:y="11.001cm" svg:viewBox="0 0 1813 585" draw:points="0,0 1813,0 1813,585 0,585">
          <text:p/>
        </draw:polygon>
        <draw:polygon draw:style-name="gr6" draw:text-style-name="P7" draw:layer="layout" svg:width="2.998cm" svg:height="0.584cm" svg:x="8.791cm" svg:y="11.001cm" svg:viewBox="0 0 2999 585" draw:points="0,0 2999,0 2999,585 0,585">
          <text:p/>
        </draw:polygon>
        <draw:frame draw:style-name="gr2" draw:text-style-name="P3" draw:layer="layout" svg:width="8.173cm" svg:height="0.543cm" svg:x="2.998cm" svg:y="10.463cm">
          <draw:text-box>
            <text:p text:style-name="P1"><text:span text:style-name="T11">Ответ: </text:span><text:span text:style-name="T6">В своём домашнем каталоге в </text:span></text:p>
          </draw:text-box>
        </draw:frame>
        <draw:polygon draw:style-name="gr4" draw:text-style-name="P5" draw:layer="layout" svg:width="17.744cm" svg:height="0.568cm" svg:x="2.312cm" svg:y="11.585cm" svg:viewBox="0 0 17745 569" draw:points="0,0 17745,0 17745,569 0,569">
          <text:p/>
        </draw:polygon>
        <draw:polygon draw:style-name="gr6" draw:text-style-name="P7" draw:layer="layout" svg:width="1.838cm" svg:height="0.585cm" svg:x="5.615cm" svg:y="11.568cm" svg:viewBox="0 0 1839 586" draw:points="0,0 1839,0 1839,586 0,586">
          <text:p/>
        </draw:polygon>
        <draw:polygon draw:style-name="gr6" draw:text-style-name="P7" draw:layer="layout" svg:width="1.813cm" svg:height="0.585cm" svg:x="8.478cm" svg:y="11.568cm" svg:viewBox="0 0 1814 586" draw:points="0,0 1814,0 1814,586 0,586">
          <text:p/>
        </draw:polygon>
        <draw:frame draw:style-name="gr2" draw:text-style-name="P3" draw:layer="layout" svg:width="16.462cm" svg:height="0.543cm" svg:x="2.998cm" svg:y="11.03cm">
          <draw:text-box>
            <text:p text:style-name="P1"><text:span text:style-name="T6">файлах ~/.profile, ~/.bashrc, ~/.bash_profile и т.д. (стр. 8). В Astra Linux обычно </text:span></text:p>
          </draw:text-box>
        </draw:frame>
        <draw:polygon draw:style-name="gr4" draw:text-style-name="P5" draw:layer="layout" svg:width="17.744cm" svg:height="0.567cm" svg:x="2.312cm" svg:y="12.153cm" svg:viewBox="0 0 17745 568" draw:points="0,0 17745,0 17745,568 0,568">
          <text:p/>
        </draw:polygon>
        <draw:frame draw:style-name="gr2" draw:text-style-name="P3" draw:layer="layout" svg:width="7.506cm" svg:height="0.543cm" svg:x="2.998cm" svg:y="11.597cm">
          <draw:text-box>
            <text:p text:style-name="P1"><text:span text:style-name="T6">используют ~/.profile или ~/.bashrc. </text:span></text:p>
          </draw:text-box>
        </draw:frame>
        <draw:frame draw:style-name="gr2" draw:text-style-name="P3" draw:layer="layout" svg:width="0.49cm" svg:height="0.543cm" svg:x="2.363cm" svg:y="12.173cm">
          <draw:text-box>
            <text:p text:style-name="P1"><text:span text:style-name="T6">5.</text:span></text:p>
          </draw:text-box>
        </draw:frame>
        <draw:frame draw:style-name="gr2" draw:text-style-name="P3" draw:layer="layout" svg:width="0.49cm" svg:height="0.552cm" svg:x="2.736cm" svg:y="12.166cm">
          <draw:text-box>
            <text:p text:style-name="P1"><text:span text:style-name="T10"><text:s/></text:span></text:p>
          </draw:text-box>
        </draw:frame>
        <draw:polygon draw:style-name="gr4" draw:text-style-name="P5" draw:layer="layout" svg:width="17.744cm" svg:height="0.568cm" svg:x="2.312cm" svg:y="12.72cm" svg:viewBox="0 0 17745 569" draw:points="0,0 17745,0 17745,569 0,569">
          <text:p/>
        </draw:polygon>
        <draw:frame draw:style-name="gr2" draw:text-style-name="P3" draw:layer="layout" svg:width="6.718cm" svg:height="0.543cm" svg:x="2.998cm" svg:y="12.173cm">
          <draw:text-box>
            <text:p text:style-name="P1"><text:span text:style-name="T8">Что делает команда printenv? </text:span></text:p>
          </draw:text-box>
        </draw:frame>
        <draw:polygon draw:style-name="gr4" draw:text-style-name="P5" draw:layer="layout" svg:width="17.744cm" svg:height="0.567cm" svg:x="2.312cm" svg:y="13.288cm" svg:viewBox="0 0 17745 568" draw:points="0,0 17745,0 17745,568 0,568">
          <text:p/>
        </draw:polygon>
        <draw:frame draw:style-name="gr2" draw:text-style-name="P3" draw:layer="layout" svg:width="15.898cm" svg:height="0.543cm" svg:x="2.998cm" svg:y="12.732cm">
          <draw:text-box>
            <text:p text:style-name="P1"><text:span text:style-name="T11">Ответ: </text:span><text:span text:style-name="T6">Выводит все переменные окружения командной оболочки (стр. 9). </text:span></text:p>
          </draw:text-box>
        </draw:frame>
        <draw:frame draw:style-name="gr2" draw:text-style-name="P3" draw:layer="layout" svg:width="0.49cm" svg:height="0.543cm" svg:x="2.363cm" svg:y="13.308cm">
          <draw:text-box>
            <text:p text:style-name="P1"><text:span text:style-name="T6">6.</text:span></text:p>
          </draw:text-box>
        </draw:frame>
        <draw:frame draw:style-name="gr2" draw:text-style-name="P3" draw:layer="layout" svg:width="0.49cm" svg:height="0.552cm" svg:x="2.736cm" svg:y="13.301cm">
          <draw:text-box>
            <text:p text:style-name="P1"><text:span text:style-name="T10"><text:s/></text:span></text:p>
          </draw:text-box>
        </draw:frame>
        <draw:polygon draw:style-name="gr4" draw:text-style-name="P5" draw:layer="layout" svg:width="17.744cm" svg:height="0.567cm" svg:x="2.312cm" svg:y="13.855cm" svg:viewBox="0 0 17745 568" draw:points="0,0 17745,0 17745,568 0,568">
          <text:p/>
        </draw:polygon>
        <draw:frame draw:style-name="gr2" draw:text-style-name="P3" draw:layer="layout" svg:width="15.034cm" svg:height="0.543cm" svg:x="2.998cm" svg:y="13.308cm">
          <draw:text-box>
            <text:p text:style-name="P1"><text:span text:style-name="T8">Какой файл определит настройки окружения пользователя, если в </text:span></text:p>
          </draw:text-box>
        </draw:frame>
        <draw:polygon draw:style-name="gr4" draw:text-style-name="P5" draw:layer="layout" svg:width="17.744cm" svg:height="0.568cm" svg:x="2.312cm" svg:y="14.422cm" svg:viewBox="0 0 17745 569" draw:points="0,0 17745,0 17745,569 0,569">
          <text:p/>
        </draw:polygon>
        <draw:frame draw:style-name="gr2" draw:text-style-name="P3" draw:layer="layout" svg:width="14.584cm" svg:height="0.543cm" svg:x="2.998cm" svg:y="13.875cm">
          <draw:text-box>
            <text:p text:style-name="P1"><text:span text:style-name="T8">домашней директории пользователя лежат сразу четыре файла - </text:span></text:p>
          </draw:text-box>
        </draw:frame>
        <draw:polygon draw:style-name="gr4" draw:text-style-name="P5" draw:layer="layout" svg:width="17.744cm" svg:height="0.567cm" svg:x="2.312cm" svg:y="14.99cm" svg:viewBox="0 0 17745 568" draw:points="0,0 17745,0 17745,568 0,568">
          <text:p/>
        </draw:polygon>
        <draw:frame draw:style-name="gr2" draw:text-style-name="P3" draw:layer="layout" svg:width="9.292cm" svg:height="0.543cm" svg:x="2.998cm" svg:y="14.443cm">
          <draw:text-box>
            <text:p text:style-name="P1"><text:span text:style-name="T8">.bash_profile, .bash_login, .profile, .bashrc? </text:span></text:p>
          </draw:text-box>
        </draw:frame>
        <draw:polygon draw:style-name="gr4" draw:text-style-name="P5" draw:layer="layout" svg:width="17.744cm" svg:height="0.567cm" svg:x="2.312cm" svg:y="15.557cm" svg:viewBox="0 0 17745 568" draw:points="0,0 17745,0 17745,568 0,568">
          <text:p/>
        </draw:polygon>
        <draw:polygon draw:style-name="gr6" draw:text-style-name="P7" draw:layer="layout" svg:width="2.592cm" svg:height="0.584cm" svg:x="6.496cm" svg:y="15.54cm" svg:viewBox="0 0 2593 585" draw:points="0,0 2593,0 2593,585 0,585">
          <text:p/>
        </draw:polygon>
        <draw:polygon draw:style-name="gr6" draw:text-style-name="P7" draw:layer="layout" svg:width="2.279cm" svg:height="0.584cm" svg:x="10.629cm" svg:y="15.54cm" svg:viewBox="0 0 2280 585" draw:points="0,0 2280,0 2280,585 0,585">
          <text:p/>
        </draw:polygon>
        <draw:polygon draw:style-name="gr6" draw:text-style-name="P7" draw:layer="layout" svg:width="1.43cm" svg:height="0.584cm" svg:x="14.45cm" svg:y="15.54cm" svg:viewBox="0 0 1431 585" draw:points="0,0 1431,0 1431,585 0,585">
          <text:p/>
        </draw:polygon>
        <draw:frame draw:style-name="gr2" draw:text-style-name="P3" draw:layer="layout" svg:width="16.092cm" svg:height="0.543cm" svg:x="2.998cm" svg:y="15.001cm">
          <draw:text-box>
            <text:p text:style-name="P1"><text:span text:style-name="T11">Ответ: </text:span><text:span text:style-name="T6">При интерактивном входе с аутентификацией Bash ищет первый из </text:span></text:p>
          </draw:text-box>
        </draw:frame>
        <draw:polygon draw:style-name="gr4" draw:text-style-name="P5" draw:layer="layout" svg:width="17.744cm" svg:height="0.577cm" svg:x="2.312cm" svg:y="16.124cm" svg:viewBox="0 0 17745 578" draw:points="0,0 17745,0 17745,578 0,578">
          <text:p/>
        </draw:polygon>
        <draw:polygon draw:style-name="gr6" draw:text-style-name="P7" draw:layer="layout" svg:width="2.592cm" svg:height="0.585cm" svg:x="7.046cm" svg:y="16.107cm" svg:viewBox="0 0 2593 586" draw:points="0,0 2593,0 2593,586 0,586">
          <text:p/>
        </draw:polygon>
        <draw:frame draw:style-name="gr2" draw:text-style-name="P3" draw:layer="layout" svg:width="16.471cm" svg:height="0.543cm" svg:x="2.998cm" svg:y="15.569cm">
          <draw:text-box>
            <text:p text:style-name="P1"><text:span text:style-name="T6">существующих: .bash_profile, затем .bash_login, затем .profile. Таким образом, </text:span></text:p>
          </draw:text-box>
        </draw:frame>
        <draw:polygon draw:style-name="gr4" draw:text-style-name="P5" draw:layer="layout" svg:width="17.744cm" svg:height="0.567cm" svg:x="2.312cm" svg:y="16.701cm" svg:viewBox="0 0 17745 568" draw:points="0,0 17745,0 17745,568 0,568">
          <text:p/>
        </draw:polygon>
        <draw:frame draw:style-name="gr2" draw:text-style-name="P3" draw:layer="layout" svg:width="8.477cm" svg:height="0.543cm" svg:x="2.998cm" svg:y="16.137cm">
          <draw:text-box>
            <text:p text:style-name="P1"><text:span text:style-name="T6">будет использован .bash_profile (стр. 5). </text:span></text:p>
          </draw:text-box>
        </draw:frame>
        <draw:frame draw:style-name="gr2" draw:text-style-name="P3" draw:layer="layout" svg:width="0.49cm" svg:height="0.543cm" svg:x="2.363cm" svg:y="16.721cm">
          <draw:text-box>
            <text:p text:style-name="P1"><text:span text:style-name="T6">7.</text:span></text:p>
          </draw:text-box>
        </draw:frame>
        <draw:frame draw:style-name="gr2" draw:text-style-name="P3" draw:layer="layout" svg:width="0.49cm" svg:height="0.552cm" svg:x="2.736cm" svg:y="16.714cm">
          <draw:text-box>
            <text:p text:style-name="P1"><text:span text:style-name="T10"><text:s/></text:span></text:p>
          </draw:text-box>
        </draw:frame>
        <draw:polygon draw:style-name="gr4" draw:text-style-name="P5" draw:layer="layout" svg:width="17.744cm" svg:height="0.567cm" svg:x="2.312cm" svg:y="17.268cm" svg:viewBox="0 0 17745 568" draw:points="0,0 17745,0 17745,568 0,568">
          <text:p/>
        </draw:polygon>
        <draw:frame draw:style-name="gr2" draw:text-style-name="P3" draw:layer="layout" svg:width="16.612cm" svg:height="0.543cm" svg:x="2.998cm" svg:y="16.721cm">
          <draw:text-box>
            <text:p text:style-name="P1"><text:span text:style-name="T8">Какой командой можно создать переменную окружения в текущем сеансе </text:span></text:p>
          </draw:text-box>
        </draw:frame>
        <draw:polygon draw:style-name="gr4" draw:text-style-name="P5" draw:layer="layout" svg:width="17.744cm" svg:height="0.568cm" svg:x="2.312cm" svg:y="17.835cm" svg:viewBox="0 0 17745 569" draw:points="0,0 17745,0 17745,569 0,569">
          <text:p/>
        </draw:polygon>
        <draw:polygon draw:style-name="gr6" draw:text-style-name="P7" draw:layer="layout" svg:width="7.131cm" svg:height="0.585cm" svg:x="4.785cm" svg:y="17.818cm" svg:viewBox="0 0 7132 586" draw:points="0,0 7132,0 7132,586 0,586">
          <text:p/>
        </draw:polygon>
        <draw:frame draw:style-name="gr2" draw:text-style-name="P3" draw:layer="layout" svg:width="3.388cm" svg:height="0.543cm" svg:x="2.998cm" svg:y="17.288cm">
          <draw:text-box>
            <text:p text:style-name="P1"><text:span text:style-name="T8">пользователя? </text:span></text:p>
          </draw:text-box>
        </draw:frame>
        <draw:polygon draw:style-name="gr4" draw:text-style-name="P5" draw:layer="layout" svg:width="17.744cm" svg:height="0.567cm" svg:x="2.312cm" svg:y="18.403cm" svg:viewBox="0 0 17745 568" draw:points="0,0 17745,0 17745,568 0,568">
          <text:p/>
        </draw:polygon>
        <draw:frame draw:style-name="gr2" draw:text-style-name="P3" draw:layer="layout" svg:width="10.982cm" svg:height="0.543cm" svg:x="2.998cm" svg:y="17.847cm">
          <draw:text-box>
            <text:p text:style-name="P1"><text:span text:style-name="T11">Ответ: </text:span><text:span text:style-name="T6">export имя_переменной=значение (стр. 10). </text:span></text:p>
          </draw:text-box>
        </draw:frame>
        <draw:frame draw:style-name="gr2" draw:text-style-name="P3" draw:layer="layout" svg:width="0.49cm" svg:height="0.543cm" svg:x="2.363cm" svg:y="18.423cm">
          <draw:text-box>
            <text:p text:style-name="P1"><text:span text:style-name="T6">8.</text:span></text:p>
          </draw:text-box>
        </draw:frame>
        <draw:frame draw:style-name="gr2" draw:text-style-name="P3" draw:layer="layout" svg:width="0.49cm" svg:height="0.552cm" svg:x="2.736cm" svg:y="18.416cm">
          <draw:text-box>
            <text:p text:style-name="P1"><text:span text:style-name="T10"><text:s/></text:span></text:p>
          </draw:text-box>
        </draw:frame>
        <draw:polygon draw:style-name="gr4" draw:text-style-name="P5" draw:layer="layout" svg:width="17.744cm" svg:height="0.568cm" svg:x="2.312cm" svg:y="18.97cm" svg:viewBox="0 0 17745 569" draw:points="0,0 17745,0 17745,569 0,569">
          <text:p/>
        </draw:polygon>
        <draw:frame draw:style-name="gr2" draw:text-style-name="P3" draw:layer="layout" svg:width="15.494cm" svg:height="0.543cm" svg:x="2.998cm" svg:y="18.423cm">
          <draw:text-box>
            <text:p text:style-name="P1"><text:span text:style-name="T8">С помощью какой команды можно запустить программу, передав ей </text:span></text:p>
          </draw:text-box>
        </draw:frame>
        <draw:polygon draw:style-name="gr4" draw:text-style-name="P5" draw:layer="layout" svg:width="17.744cm" svg:height="0.567cm" svg:x="2.312cm" svg:y="19.538cm" svg:viewBox="0 0 17745 568" draw:points="0,0 17745,0 17745,568 0,568">
          <text:p/>
        </draw:polygon>
        <draw:polygon draw:style-name="gr6" draw:text-style-name="P7" draw:layer="layout" svg:width="0.712cm" svg:height="0.584cm" svg:x="4.785cm" svg:y="19.521cm" svg:viewBox="0 0 713 585" draw:points="0,0 713,0 713,585 0,585">
          <text:p/>
        </draw:polygon>
        <draw:polygon draw:style-name="gr6" draw:text-style-name="P7" draw:layer="layout" svg:width="7.309cm" svg:height="0.584cm" svg:x="8.072cm" svg:y="19.521cm" svg:viewBox="0 0 7310 585" draw:points="0,0 7310,0 7310,585 0,585">
          <text:p/>
        </draw:polygon>
        <draw:frame draw:style-name="gr2" draw:text-style-name="P3" draw:layer="layout" svg:width="10.684cm" svg:height="0.543cm" svg:x="2.998cm" svg:y="18.991cm">
          <draw:text-box>
            <text:p text:style-name="P1"><text:span text:style-name="T8">измененные значения переменных окружения? </text:span></text:p>
          </draw:text-box>
        </draw:frame>
        <draw:polygon draw:style-name="gr4" draw:text-style-name="P5" draw:layer="layout" svg:width="17.744cm" svg:height="0.568cm" svg:x="2.312cm" svg:y="20.105cm" svg:viewBox="0 0 17745 569" draw:points="0,0 17745,0 17745,569 0,569">
          <text:p/>
        </draw:polygon>
        <draw:frame draw:style-name="gr2" draw:text-style-name="P3" draw:layer="layout" svg:width="14.584cm" svg:height="0.543cm" svg:x="2.998cm" svg:y="19.55cm">
          <draw:text-box>
            <text:p text:style-name="P1"><text:span text:style-name="T11">Ответ: </text:span><text:span text:style-name="T6">env (например, env LANG=en_US.UTF-8 man bash) (стр. 10). </text:span></text:p>
          </draw:text-box>
        </draw:frame>
        <draw:frame draw:style-name="gr2" draw:text-style-name="P3" draw:layer="layout" svg:width="0.49cm" svg:height="0.543cm" svg:x="2.363cm" svg:y="20.126cm">
          <draw:text-box>
            <text:p text:style-name="P1"><text:span text:style-name="T6">9.</text:span></text:p>
          </draw:text-box>
        </draw:frame>
        <draw:frame draw:style-name="gr2" draw:text-style-name="P3" draw:layer="layout" svg:width="0.49cm" svg:height="0.552cm" svg:x="2.736cm" svg:y="20.119cm">
          <draw:text-box>
            <text:p text:style-name="P1"><text:span text:style-name="T10"><text:s/></text:span></text:p>
          </draw:text-box>
        </draw:frame>
        <draw:polygon draw:style-name="gr4" draw:text-style-name="P5" draw:layer="layout" svg:width="17.744cm" svg:height="0.567cm" svg:x="2.312cm" svg:y="20.673cm" svg:viewBox="0 0 17745 568" draw:points="0,0 17745,0 17745,568 0,568">
          <text:p/>
        </draw:polygon>
        <draw:frame draw:style-name="gr2" draw:text-style-name="P3" draw:layer="layout" svg:width="15.74cm" svg:height="0.543cm" svg:x="2.998cm" svg:y="20.126cm">
          <draw:text-box>
            <text:p text:style-name="P1"><text:span text:style-name="T8">В каком отдельном файле можно определить псевдонимы команд для </text:span></text:p>
          </draw:text-box>
        </draw:frame>
        <draw:polygon draw:style-name="gr4" draw:text-style-name="P5" draw:layer="layout" svg:width="17.744cm" svg:height="0.567cm" svg:x="2.312cm" svg:y="21.24cm" svg:viewBox="0 0 17745 568" draw:points="0,0 17745,0 17745,568 0,568">
          <text:p/>
        </draw:polygon>
        <draw:polygon draw:style-name="gr6" draw:text-style-name="P7" draw:layer="layout" svg:width="2.998cm" svg:height="0.584cm" svg:x="6.631cm" svg:y="21.223cm" svg:viewBox="0 0 2999 585" draw:points="0,0 2999,0 2999,585 0,585">
          <text:p/>
        </draw:polygon>
        <draw:frame draw:style-name="gr2" draw:text-style-name="P3" draw:layer="layout" svg:width="6.334cm" svg:height="0.543cm" svg:x="2.998cm" svg:y="20.693cm">
          <draw:text-box>
            <text:p text:style-name="P1"><text:span text:style-name="T8">конкретного пользователя? </text:span></text:p>
          </draw:text-box>
        </draw:frame>
        <draw:polygon draw:style-name="gr4" draw:text-style-name="P5" draw:layer="layout" svg:width="17.744cm" svg:height="0.568cm" svg:x="2.312cm" svg:y="21.807cm" svg:viewBox="0 0 17745 569" draw:points="0,0 17745,0 17745,569 0,569">
          <text:p/>
        </draw:polygon>
        <draw:frame draw:style-name="gr2" draw:text-style-name="P3" draw:layer="layout" svg:width="8.462cm" svg:height="0.543cm" svg:x="2.998cm" svg:y="21.252cm">
          <draw:text-box>
            <text:p text:style-name="P1"><text:span text:style-name="T11">Ответ: </text:span><text:span text:style-name="T6">В файле ~/.bash_aliases (стр. 4). </text:span></text:p>
          </draw:text-box>
        </draw:frame>
        <draw:frame draw:style-name="gr2" draw:text-style-name="P3" draw:layer="layout" svg:width="0.616cm" svg:height="0.543cm" svg:x="2.363cm" svg:y="21.828cm">
          <draw:text-box>
            <text:p text:style-name="P1"><text:span text:style-name="T6">10.</text:span></text:p>
          </draw:text-box>
        </draw:frame>
        <draw:frame draw:style-name="gr2" draw:text-style-name="P3" draw:layer="layout" svg:width="0.49cm" svg:height="0.552cm" svg:x="2.981cm" svg:y="21.821cm">
          <draw:text-box>
            <text:p text:style-name="P1"><text:span text:style-name="T10"><text:s/></text:span></text:p>
          </draw:text-box>
        </draw:frame>
        <draw:polygon draw:style-name="gr4" draw:text-style-name="P5" draw:layer="layout" svg:width="17.744cm" svg:height="0.567cm" svg:x="2.312cm" svg:y="22.375cm" svg:viewBox="0 0 17745 568" draw:points="0,0 17745,0 17745,568 0,568">
          <text:p/>
        </draw:polygon>
        <draw:polygon draw:style-name="gr6" draw:text-style-name="P7" draw:layer="layout" svg:width="1.804cm" svg:height="0.584cm" svg:x="4.785cm" svg:y="22.358cm" svg:viewBox="0 0 1805 585" draw:points="0,0 1805,0 1805,585 0,585">
          <text:p/>
        </draw:polygon>
        <draw:frame draw:style-name="gr2" draw:text-style-name="P3" draw:layer="layout" svg:width="15.982cm" svg:height="0.543cm" svg:x="2.998cm" svg:y="21.828cm">
          <draw:text-box>
            <text:p text:style-name="P1"><text:span text:style-name="T8">Какая командная оболочка используется в Astra Linux по умолчанию? </text:span></text:p>
          </draw:text-box>
        </draw:frame>
        <draw:frame draw:style-name="gr2" draw:text-style-name="P3" draw:layer="layout" svg:width="5.694cm" svg:height="0.543cm" svg:x="2.998cm" svg:y="22.387cm">
          <draw:text-box>
            <text:p text:style-name="P1"><text:span text:style-name="T11">Ответ: </text:span><text:span text:style-name="T6">/bin/bash (стр. 18). </text:span></text:p>
          </draw:text-box>
        </draw:frame>
        <draw:frame draw:style-name="gr2" draw:text-style-name="P3" draw:layer="layout" svg:width="0.49cm" svg:height="0.543cm" svg:x="0.999cm" svg:y="22.9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23.80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24.6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25.51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2.998cm" svg:y="26.359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7cm" fo:margin-bottom="1cm" fo:margin-left="0.9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5-20T01:27:33.790454700</dc:date>
    <meta:editing-duration>PT1M43S</meta:editing-duration>
    <meta:editing-cycles>1</meta:editing-cycles>
    <meta:document-statistic meta:object-count="299"/>
    <meta:generator>LibreOffice/26.2.3.1$Windows_X86_64 LibreOffice_project/d444ea7836163cb762d1627df3bc33e112fa142a</meta:generator>
  </office:meta>
</office:document-meta>
</file>